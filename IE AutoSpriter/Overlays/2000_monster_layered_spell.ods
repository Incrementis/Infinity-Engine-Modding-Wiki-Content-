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A00000050409DE4534996F6CC.png" manifest:media-type="image/png"/>
  <manifest:file-entry manifest:full-path="Pictures/1000000100000199000000B5723A552589C6E3BF.png" manifest:media-type="image/png"/>
  <manifest:file-entry manifest:full-path="Pictures/100000010000007B00000067CD054F45B6A2B216.png" manifest:media-type="image/png"/>
  <manifest:file-entry manifest:full-path="Pictures/100000010000004A000000485EC90B32677AF392.png" manifest:media-type="image/png"/>
  <manifest:file-entry manifest:full-path="Pictures/10000001000000670000006618CFA7DC78B3CA06.png" manifest:media-type="image/png"/>
  <manifest:file-entry manifest:full-path="Pictures/10000001000000430000006DDBFF0C1FD526E2C0.png" manifest:media-type="image/png"/>
  <manifest:file-entry manifest:full-path="Pictures/100000010000005100000053EF8039FFA6A77693.png" manifest:media-type="image/png"/>
  <manifest:file-entry manifest:full-path="Pictures/100000010000007C000000469EB43A65FC072309.png" manifest:media-type="image/png"/>
  <manifest:file-entry manifest:full-path="Pictures/1000000100000037000000452645441A4F0C63D1.png" manifest:media-type="image/png"/>
  <manifest:file-entry manifest:full-path="Pictures/1000000100000038000000526333752A4699025C.png" manifest:media-type="image/png"/>
  <manifest:file-entry manifest:full-path="Pictures/100000010000006C00000062A4A1EF84798DE038.png" manifest:media-type="image/png"/>
  <manifest:file-entry manifest:full-path="Pictures/100000010000005A00000042AA2105B3E9D40855.png" manifest:media-type="image/png"/>
  <manifest:file-entry manifest:full-path="Pictures/10000001000000430000004D323919B3580F3D80.png" manifest:media-type="image/png"/>
  <manifest:file-entry manifest:full-path="Pictures/100000010000004000000090A7B6046F7368838A.png" manifest:media-type="image/png"/>
  <manifest:file-entry manifest:full-path="Pictures/100000010000008700000076A658C68909680CED.png" manifest:media-type="image/png"/>
  <manifest:file-entry manifest:full-path="Pictures/1000000100000061000000877E06D755BD8F7048.png" manifest:media-type="image/png"/>
  <manifest:file-entry manifest:full-path="Pictures/100000010000005D0000004F50D6C8EE827BAAA4.png" manifest:media-type="image/png"/>
  <manifest:file-entry manifest:full-path="Pictures/100000010000005100000044FAA6104196379B2F.png" manifest:media-type="image/png"/>
  <manifest:file-entry manifest:full-path="Pictures/100000010000005C0000003932724199B216454B.png" manifest:media-type="image/png"/>
  <manifest:file-entry manifest:full-path="Pictures/100000010000005E000000B0AAC37F26779904C3.png" manifest:media-type="image/png"/>
  <manifest:file-entry manifest:full-path="Pictures/100000010000005700000059530B03A95EDBE66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1.414cm"/>
    </style:style>
    <style:style style:name="co2" style:family="table-column">
      <style:table-column-properties fo:break-before="auto" style:column-width="22.6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91cm"/>
    </style:style>
    <style:style style:name="co5" style:family="table-column">
      <style:table-column-properties fo:break-before="auto" style:column-width="12.353cm"/>
    </style:style>
    <style:style style:name="co6" style:family="table-column">
      <style:table-column-properties fo:break-before="auto" style:column-width="10.269cm"/>
    </style:style>
    <style:style style:name="co7" style:family="table-column">
      <style:table-column-properties fo:break-before="auto" style:column-width="12.342cm"/>
    </style:style>
    <style:style style:name="co8" style:family="table-column">
      <style:table-column-properties fo:break-before="auto" style:column-width="1.674cm"/>
    </style:style>
    <style:style style:name="ro1" style:family="table-row">
      <style:table-row-properties style:row-height="5.2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8.387cm" fo:break-before="auto" style:use-optimal-row-height="false"/>
    </style:style>
    <style:style style:name="ro4" style:family="table-row">
      <style:table-row-properties style:row-height="9.294cm" fo:break-before="auto" style:use-optimal-row-height="false"/>
    </style:style>
    <style:style style:name="ro5" style:family="table-row">
      <style:table-row-properties style:row-height="7.904cm" fo:break-before="auto" style:use-optimal-row-height="false"/>
    </style:style>
    <style:style style:name="ro6" style:family="table-row">
      <style:table-row-properties style:row-height="7.479cm" fo:break-before="auto" style:use-optimal-row-height="false"/>
    </style:style>
    <style:style style:name="ro7" style:family="table-row">
      <style:table-row-properties style:row-height="6.969cm" fo:break-before="auto" style:use-optimal-row-height="false"/>
    </style:style>
    <style:style style:name="ro8" style:family="table-row">
      <style:table-row-properties style:row-height="9.151cm" fo:break-before="auto" style:use-optimal-row-height="false"/>
    </style:style>
    <style:style style:name="ro9" style:family="table-row">
      <style:table-row-properties style:row-height="6.248cm" fo:break-before="auto" style:use-optimal-row-height="false"/>
    </style:style>
    <style:style style:name="ro10" style:family="table-row">
      <style:table-row-properties style:row-height="7.523cm" fo:break-before="auto" style:use-optimal-row-height="false"/>
    </style:style>
    <style:style style:name="ro11" style:family="table-row">
      <style:table-row-properties style:row-height="7.713cm" fo:break-before="auto" style:use-optimal-row-height="false"/>
    </style:style>
    <style:style style:name="ro12" style:family="table-row">
      <style:table-row-properties style:row-height="6.375cm" fo:break-before="auto" style:use-optimal-row-height="false"/>
    </style:style>
    <style:style style:name="ro13" style:family="table-row">
      <style:table-row-properties style:row-height="6.565cm" fo:break-before="auto" style:use-optimal-row-height="false"/>
    </style:style>
    <style:style style:name="ro14" style:family="table-row">
      <style:table-row-properties style:row-height="6.715cm" fo:break-before="auto" style:use-optimal-row-height="false"/>
    </style:style>
    <style:style style:name="ro15" style:family="table-row">
      <style:table-row-properties style:row-height="7.437cm" fo:break-before="auto" style:use-optimal-row-height="false"/>
    </style:style>
    <style:style style:name="ro16" style:family="table-row">
      <style:table-row-properties style:row-height="6.403cm" fo:break-before="auto" style:use-optimal-row-height="false"/>
    </style:style>
    <style:style style:name="ro17" style:family="table-row">
      <style:table-row-properties style:row-height="6.743cm" fo:break-before="auto" style:use-optimal-row-height="false"/>
    </style:style>
    <style:style style:name="ro18" style:family="table-row">
      <style:table-row-properties style:row-height="7.14cm" fo:break-before="auto" style:use-optimal-row-height="false"/>
    </style:style>
    <style:style style:name="ro19" style:family="table-row">
      <style:table-row-properties style:row-height="5.553cm" fo:break-before="auto" style:use-optimal-row-height="false"/>
    </style:style>
    <style:style style:name="ro20" style:family="table-row">
      <style:table-row-properties style:row-height="8.047cm" fo:break-before="auto" style:use-optimal-row-height="false"/>
    </style:style>
    <style:style style:name="ro21" style:family="table-row">
      <style:table-row-properties style:row-height="7.463cm" fo:break-before="auto" style:use-optimal-row-height="false"/>
    </style:style>
    <style:style style:name="ro22" style:family="table-row">
      <style:table-row-properties style:row-height="6.879cm" fo:break-before="auto" style:use-optimal-row-height="false"/>
    </style:style>
    <style:style style:name="ro23" style:family="table-row">
      <style:table-row-properties style:row-height="6.189cm" fo:break-before="auto" style:use-optimal-row-height="false"/>
    </style:style>
    <style:style style:name="ro24" style:family="table-row">
      <style:table-row-properties style:row-height="5.427cm" fo:break-before="auto" style:use-optimal-row-height="false"/>
    </style:style>
    <style:style style:name="ro25" style:family="table-row">
      <style:table-row-properties style:row-height="5.891cm" fo:break-before="auto" style:use-optimal-row-height="false"/>
    </style:style>
    <style:style style:name="ro26" style:family="table-row">
      <style:table-row-properties style:row-height="6.664cm" fo:break-before="auto" style:use-optimal-row-height="false"/>
    </style:style>
    <style:style style:name="ro27" style:family="table-row">
      <style:table-row-properties style:row-height="6.244cm" fo:break-before="auto" style:use-optimal-row-height="false"/>
    </style:style>
    <style:style style:name="ro28" style:family="table-row">
      <style:table-row-properties style:row-height="6.57cm" fo:break-before="auto" style:use-optimal-row-height="false"/>
    </style:style>
    <style:style style:name="ro29" style:family="table-row">
      <style:table-row-properties style:row-height="6.828cm" fo:break-before="auto" style:use-optimal-row-height="false"/>
    </style:style>
    <style:style style:name="ro30" style:family="table-row">
      <style:table-row-properties style:row-height="7.084cm" fo:break-before="auto" style:use-optimal-row-height="false"/>
    </style:style>
    <style:style style:name="ro31" style:family="table-row">
      <style:table-row-properties style:row-height="5.043cm" fo:break-before="auto" style:use-optimal-row-height="false"/>
    </style:style>
    <style:style style:name="ro32" style:family="table-row">
      <style:table-row-properties style:row-height="6.225cm" fo:break-before="auto" style:use-optimal-row-height="false"/>
    </style:style>
    <style:style style:name="ro33" style:family="table-row">
      <style:table-row-properties style:row-height="0.452cm" fo:break-before="auto" style:use-optimal-row-height="true"/>
    </style:style>
    <style:style style:name="ro3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ce9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3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30pt" style:language-asian="zh" style:country-asian="CN" style:font-style-asian="normal" style:font-weight-asian="norm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bf00" fo:border="0.74pt solid #000000"/>
    </style:style>
    <style:style style:name="ce14" style:family="table-cell" style:parent-style-name="Default">
      <style:table-cell-properties fo:background-color="#ffbf00" style:text-align-source="fix" style:repeat-content="false" fo:border="0.74pt solid #000000"/>
      <style:paragraph-properties fo:text-align="justify" fo:margin-left="0cm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afd095" fo:wrap-option="wrap" fo:border="0.74pt solid #000000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border="0.74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b4c7dc"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dee6ef" fo:border="0.74pt solid #000000"/>
      <style:text-properties fo:color="#158466" fo:font-size="13pt" style:font-size-asian="13pt" style:font-size-complex="13pt"/>
    </style:style>
    <style:style style:name="ce35" style:family="table-cell" style:parent-style-name="Default">
      <style:table-cell-properties fo:background-color="#dee6ef" fo:border="0.74pt solid #000000"/>
      <style:text-properties fo:color="#ff0000" fo:font-size="13pt" style:font-size-asian="13pt" style:font-size-complex="13pt"/>
    </style:style>
    <style:style style:name="ce18" style:family="table-cell" style:parent-style-name="Default">
      <style:table-cell-properties fo:background-color="#dee6ef" fo:border="0.74pt solid #000000"/>
      <style:text-properties fo:color="#ff0000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ee6ef" fo:border="0.74pt solid #000000"/>
      <style:text-properties fo:color="#000000" fo:font-size="13pt" style:font-size-asian="13pt" style:font-size-complex="13pt"/>
    </style:style>
    <style:style style:name="ce8" style:family="table-cell" style:parent-style-name="Default">
      <style:table-cell-properties fo:background-color="#dee6ef" fo:border="0.74pt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transparent" fo:border="none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10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" table:style-name="ta1">
        <office:forms form:automatic-focus="false" form:apply-design-mode="false"/>
        <table:shapes>
          <draw:frame draw:z-index="0" draw:name="Bild 1" draw:style-name="gr1" draw:text-style-name="P1" svg:width="10.821cm" svg:height="4.788cm" svg:x="0cm" svg:y="0cm">
            <draw:image xlink:href="Pictures/1000000100000199000000B5723A552589C6E3BF.png" xlink:type="simple" xlink:show="embed" xlink:actuate="onLoad" draw:mime-type="image/png">
              <text:p/>
            </draw:image>
          </draw:frame>
        </table:shapes>
        <table:table-column table:style-name="co1" table:default-cell-style-name="ce11"/>
        <table:table-column table:style-name="co2" table:default-cell-style-name="ce13"/>
        <table:table-row table:style-name="ro1">
          <table:table-cell table:style-name="Default" office:value-type="string" calcext:value-type="string">
            <text:p>Images taken from Near Infinty.</text:p>
          </table:table-cell>
          <table:table-cell table:style-name="ce15" office:value-type="string" calcext:value-type="string">
            <text:p>Weapon is visible when spell ist cast.</text:p>
          </table:table-cell>
        </table:table-row>
        <table:table-row table:style-name="ro2">
          <table:table-cell table:style-name="ce9" office:value-type="string" calcext:value-type="string">
            <text:p>WEAPONS</text:p>
          </table:table-cell>
          <table:table-cell table:style-name="ce12" office:value-type="string" calcext:value-type="string">
            <text:p>REPLACEMENT COLORS</text:p>
          </table:table-cell>
        </table:table-row>
        <table:table-row table:style-name="ro3">
          <table:table-cell office:value-type="string" calcext:value-type="string">
            <text:p>Axe</text:p>
          </table:table-cell>
          <table:table-cell>
            <draw:frame table:end-cell-address="Notes.B3" table:end-x="14.914cm" table:end-y="7.159cm" draw:z-index="30" draw:name="Bild 31" draw:style-name="gr1" draw:text-style-name="P1" svg:width="6.567cm" svg:height="6.391cm" svg:x="8.347cm" svg:y="0.768cm">
              <draw:image xlink:href="Pictures/100000010000004A000000485EC90B32677AF392.png" xlink:type="simple" xlink:show="embed" xlink:actuate="onLoad" draw:mime-type="image/png">
                <text:p/>
              </draw:image>
            </draw:frame>
          </table:table-cell>
        </table:table-row>
        <table:table-row table:style-name="ro4">
          <table:table-cell office:value-type="string" calcext:value-type="string">
            <text:p>Shortbow</text:p>
          </table:table-cell>
          <table:table-cell>
            <draw:frame table:end-cell-address="Notes.B4" table:end-x="13.512cm" table:end-y="8.457cm" draw:z-index="29" draw:name="Bild 30" draw:style-name="gr1" draw:text-style-name="P1" svg:width="4.553cm" svg:height="7.409cm" svg:x="8.959cm" svg:y="1.048cm">
              <draw:image xlink:href="Pictures/10000001000000430000006DDBFF0C1FD526E2C0.png" xlink:type="simple" xlink:show="embed" xlink:actuate="onLoad" draw:mime-type="image/png">
                <text:p/>
              </draw:image>
            </draw:frame>
          </table:table-cell>
        </table:table-row>
        <table:table-row table:style-name="ro5">
          <table:table-cell office:value-type="string" calcext:value-type="string">
            <text:p>Longbow</text:p>
          </table:table-cell>
          <table:table-cell>
            <draw:frame table:end-cell-address="Notes.B5" table:end-x="13.571cm" table:end-y="7.55cm" draw:z-index="28" draw:name="Bild 29" draw:style-name="gr1" draw:text-style-name="P1" svg:width="4.553cm" svg:height="7.409cm" svg:x="9.018cm" svg:y="0.141cm">
              <draw:image xlink:href="Pictures/10000001000000430000006DDBFF0C1FD526E2C0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 office:value-type="string" calcext:value-type="string">
            <text:p>Crossbow</text:p>
          </table:table-cell>
          <table:table-cell>
            <draw:frame table:end-cell-address="Notes.B6" table:end-x="14.038cm" table:end-y="6.629cm" draw:z-index="27" draw:name="Bild 28" draw:style-name="gr1" draw:text-style-name="P1" svg:width="5.633cm" svg:height="6.09cm" svg:x="8.405cm" svg:y="0.539cm">
              <draw:image xlink:href="Pictures/100000010000004A00000050409DE4534996F6CC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Club</text:p>
          </table:table-cell>
          <table:table-cell>
            <draw:frame table:end-cell-address="Notes.B7" table:end-x="15.234cm" table:end-y="6.021cm" draw:z-index="26" draw:name="Bild 27" draw:style-name="gr1" draw:text-style-name="P1" svg:width="8.873cm" svg:height="5.006cm" svg:x="6.361cm" svg:y="1.015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8">
          <table:table-cell office:value-type="string" calcext:value-type="string">
            <text:p>Dagger</text:p>
          </table:table-cell>
          <table:table-cell>
            <draw:frame table:end-cell-address="Notes.B8" table:end-x="13.572cm" table:end-y="8.221cm" draw:z-index="25" draw:name="Bild 26" draw:style-name="gr1" draw:text-style-name="P1" svg:width="5.691cm" svg:height="7.14cm" svg:x="7.881cm" svg:y="1.081cm">
              <draw:image xlink:href="Pictures/1000000100000037000000452645441A4F0C63D1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string" calcext:value-type="string">
            <text:p>Flail (alternate 1)</text:p>
          </table:table-cell>
          <table:table-cell>
            <draw:frame table:end-cell-address="Notes.B9" table:end-x="14.156cm" table:end-y="6.041cm" draw:z-index="24" draw:name="Bild 25" draw:style-name="gr1" draw:text-style-name="P1" svg:width="7.124cm" svg:height="5.966cm" svg:x="7.032cm" svg:y="0.075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0">
          <table:table-cell office:value-type="string" calcext:value-type="string">
            <text:p>Flail (alternate 2)</text:p>
          </table:table-cell>
          <table:table-cell>
            <draw:frame table:end-cell-address="Notes.B10" table:end-x="14.039cm" table:end-y="6.643cm" draw:z-index="23" draw:name="Bild 24" draw:style-name="gr1" draw:text-style-name="P1" svg:width="7.124cm" svg:height="5.966cm" svg:x="6.915cm" svg:y="0.677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1">
          <table:table-cell office:value-type="string" calcext:value-type="string">
            <text:p>Flaming Short Sword</text:p>
          </table:table-cell>
          <table:table-cell>
            <draw:frame table:end-cell-address="Notes.B11" table:end-x="12.587cm" table:end-y="6.814cm" draw:z-index="22" draw:name="Bild 23" draw:style-name="gr1" draw:text-style-name="P1" svg:width="4.129cm" svg:height="6.047cm" svg:x="8.458cm" svg:y="0.767cm">
              <draw:image xlink:href="Pictures/1000000100000038000000526333752A4699025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2">
          <table:table-cell office:value-type="string" calcext:value-type="string">
            <text:p>Flail (alternate 3)</text:p>
          </table:table-cell>
          <table:table-cell>
            <draw:frame table:end-cell-address="Notes.B12" table:end-x="14.045cm" table:end-y="6.076cm" draw:z-index="21" draw:name="Bild 22" draw:style-name="gr1" draw:text-style-name="P1" svg:width="7.124cm" svg:height="5.966cm" svg:x="6.921cm" svg:y="0.11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3">
          <table:table-cell office:value-type="string" calcext:value-type="string">
            <text:p>Flail</text:p>
          </table:table-cell>
          <table:table-cell>
            <draw:frame table:end-cell-address="Notes.B13" table:end-x="14.051cm" table:end-y="6.328cm" draw:z-index="20" draw:name="Bild 21" draw:style-name="gr1" draw:text-style-name="P1" svg:width="7.124cm" svg:height="5.966cm" svg:x="6.927cm" svg:y="0.362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4">
          <table:table-cell office:value-type="string" calcext:value-type="string">
            <text:p>Flaming Long Sword</text:p>
          </table:table-cell>
          <table:table-cell>
            <draw:frame table:end-cell-address="Notes.B14" table:end-x="13.92cm" table:end-y="5.809cm" draw:z-index="19" draw:name="Bild 20" draw:style-name="gr1" draw:text-style-name="P1" svg:width="6.644cm" svg:height="4.871cm" svg:x="7.276cm" svg:y="0.938cm">
              <draw:image xlink:href="Pictures/100000010000005A00000042AA2105B3E9D4085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5">
          <table:table-cell office:value-type="string" calcext:value-type="string">
            <text:p>Glowing Staff</text:p>
          </table:table-cell>
          <table:table-cell>
            <draw:frame table:end-cell-address="Notes.B15" table:end-x="12.129cm" table:end-y="7.176cm" draw:z-index="18" draw:name="Bild 19" draw:style-name="gr1" draw:text-style-name="P1" svg:width="3.016cm" svg:height="6.792cm" svg:x="9.113cm" svg:y="0.384cm">
              <draw:image xlink:href="Pictures/100000010000004000000090A7B6046F7368838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6">
          <table:table-cell office:value-type="string" calcext:value-type="string">
            <text:p>Halberd</text:p>
          </table:table-cell>
          <table:table-cell>
            <draw:frame table:end-cell-address="Notes.B16" table:end-x="13.718cm" table:end-y="5.97cm" draw:z-index="17" draw:name="Bild 18" draw:style-name="gr1" draw:text-style-name="P1" svg:width="6.538cm" svg:height="5.714cm" svg:x="7.18cm" svg:y="0.256cm">
              <draw:image xlink:href="Pictures/100000010000008700000076A658C68909680CED.png" xlink:type="simple" xlink:show="embed" xlink:actuate="onLoad" draw:mime-type="image/png">
                <text:p/>
              </draw:image>
            </draw:frame>
          </table:table-cell>
        </table:table-row>
        <table:table-row table:style-name="ro17">
          <table:table-cell office:value-type="string" calcext:value-type="string">
            <text:p>Mace (alternate)</text:p>
          </table:table-cell>
          <table:table-cell>
            <draw:frame table:end-cell-address="Notes.B17" table:end-x="14.942cm" table:end-y="5.815cm" draw:z-index="16" draw:name="Bild 17" draw:style-name="gr1" draw:text-style-name="P1" svg:width="8.873cm" svg:height="5.006cm" svg:x="6.069cm" svg:y="0.809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8">
          <table:table-cell office:value-type="string" calcext:value-type="string">
            <text:p>Mace</text:p>
          </table:table-cell>
          <table:table-cell>
            <draw:frame table:end-cell-address="Notes.B18" table:end-x="15cm" table:end-y="6.264cm" draw:z-index="15" draw:name="Bild 16" draw:style-name="gr1" draw:text-style-name="P1" svg:width="8.873cm" svg:height="5.006cm" svg:x="6.127cm" svg:y="1.258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9">
          <table:table-cell office:value-type="string" calcext:value-type="string">
            <text:p>Morning Star</text:p>
          </table:table-cell>
          <table:table-cell>
            <draw:frame table:end-cell-address="Notes.B19" table:end-x="15.147cm" table:end-y="5.208cm" draw:z-index="14" draw:name="Bild 15" draw:style-name="gr1" draw:text-style-name="P1" svg:width="8.873cm" svg:height="5.006cm" svg:x="6.274cm" svg:y="0.202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20">
          <table:table-cell office:value-type="string" calcext:value-type="string">
            <text:p>Quarterstaff (alternate 1)</text:p>
          </table:table-cell>
          <table:table-cell>
            <draw:frame table:end-cell-address="Notes.B20" table:end-x="12.948cm" table:end-y="7.071cm" draw:z-index="13" draw:name="Bild 14" draw:style-name="gr1" draw:text-style-name="P1" svg:width="4.135cm" svg:height="5.755cm" svg:x="8.813cm" svg:y="1.316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21">
          <table:table-cell office:value-type="string" calcext:value-type="string">
            <text:p>Quarterstaff (alternate 2)</text:p>
          </table:table-cell>
          <table:table-cell>
            <draw:frame table:end-cell-address="Notes.B21" table:end-x="13.102cm" table:end-y="6.657cm" draw:z-index="12" draw:name="Bild 13" draw:style-name="gr1" draw:text-style-name="P1" svg:width="4.135cm" svg:height="5.755cm" svg:x="8.967cm" svg:y="0.902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22">
          <table:table-cell office:value-type="string" calcext:value-type="string">
            <text:p>Quarterstaff (alternate 3)</text:p>
          </table:table-cell>
          <table:table-cell>
            <draw:frame table:end-cell-address="Notes.B22" table:end-x="13.211cm" table:end-y="6.331cm" draw:z-index="11" draw:name="Bild 12" draw:style-name="gr1" draw:text-style-name="P1" svg:width="4.135cm" svg:height="5.755cm" svg:x="9.076cm" svg:y="0.576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23">
          <table:table-cell office:value-type="string" calcext:value-type="string">
            <text:p>Quarterstaff</text:p>
          </table:table-cell>
          <table:table-cell>
            <draw:frame table:end-cell-address="Notes.B23" table:end-x="13.223cm" table:end-y="5.968cm" draw:z-index="10" draw:name="Bild 11" draw:style-name="gr1" draw:text-style-name="P1" svg:width="4.135cm" svg:height="5.755cm" svg:x="9.088cm" svg:y="0.213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24">
          <table:table-cell office:value-type="string" calcext:value-type="string">
            <text:p>One-Handed Sword: Bastard</text:p>
          </table:table-cell>
          <table:table-cell>
            <draw:frame table:end-cell-address="Notes.B24" table:end-x="13.831cm" table:end-y="4.942cm" draw:z-index="9" draw:name="Bild 10" draw:style-name="gr1" draw:text-style-name="P1" svg:width="5.314cm" svg:height="4.514cm" svg:x="8.517cm" svg:y="0.428cm">
              <draw:image xlink:href="Pictures/100000010000005D0000004F50D6C8EE827BAAA4.png" xlink:type="simple" xlink:show="embed" xlink:actuate="onLoad" draw:mime-type="image/png">
                <text:p/>
              </draw:image>
            </draw:frame>
          </table:table-cell>
        </table:table-row>
        <table:table-row table:style-name="ro25">
          <table:table-cell office:value-type="string" calcext:value-type="string">
            <text:p>One-Handed Sword: Broad/Long</text:p>
          </table:table-cell>
          <table:table-cell>
            <draw:frame table:end-cell-address="Notes.B25" table:end-x="13.68cm" table:end-y="5.128cm" draw:z-index="8" draw:name="Bild 9" draw:style-name="gr1" draw:text-style-name="P1" svg:width="5.207cm" svg:height="4.371cm" svg:x="8.473cm" svg:y="0.757cm">
              <draw:image xlink:href="Pictures/100000010000005100000044FAA6104196379B2F.png" xlink:type="simple" xlink:show="embed" xlink:actuate="onLoad" draw:mime-type="image/png">
                <text:p/>
              </draw:image>
            </draw:frame>
          </table:table-cell>
        </table:table-row>
        <table:table-row table:style-name="ro26">
          <table:table-cell office:value-type="string" calcext:value-type="string">
            <text:p>Twp-Handed Sword</text:p>
          </table:table-cell>
          <table:table-cell>
            <draw:frame table:end-cell-address="Notes.B26" table:end-x="13.878cm" table:end-y="6.113cm" draw:z-index="7" draw:name="Bild 8" draw:style-name="gr1" draw:text-style-name="P1" svg:width="5.623cm" svg:height="5.569cm" svg:x="8.255cm" svg:y="0.544cm">
              <draw:image xlink:href="Pictures/10000001000000670000006618CFA7DC78B3CA06.png" xlink:type="simple" xlink:show="embed" xlink:actuate="onLoad" draw:mime-type="image/png">
                <text:p/>
              </draw:image>
            </draw:frame>
          </table:table-cell>
        </table:table-row>
        <table:table-row table:style-name="ro27">
          <table:table-cell office:value-type="string" calcext:value-type="string">
            <text:p>One-Handed Sword: Katana</text:p>
          </table:table-cell>
          <table:table-cell>
            <draw:frame table:end-cell-address="Notes.B27" table:end-x="14.056cm" table:end-y="5.822cm" draw:z-index="6" draw:name="Bild 7" draw:style-name="gr1" draw:text-style-name="P1" svg:width="6.053cm" svg:height="5.491cm" svg:x="8.003cm" svg:y="0.331cm">
              <draw:image xlink:href="Pictures/100000010000006C00000062A4A1EF84798DE038.png" xlink:type="simple" xlink:show="embed" xlink:actuate="onLoad" draw:mime-type="image/png">
                <text:p/>
              </draw:image>
            </draw:frame>
          </table:table-cell>
        </table:table-row>
        <table:table-row table:style-name="ro28">
          <table:table-cell office:value-type="string" calcext:value-type="string">
            <text:p>One-Handed Sword: Scimitar</text:p>
          </table:table-cell>
          <table:table-cell>
            <draw:frame table:end-cell-address="Notes.B28" table:end-x="14.679cm" table:end-y="5.615cm" draw:z-index="5" draw:name="Bild 6" draw:style-name="gr1" draw:text-style-name="P1" svg:width="7.416cm" svg:height="4.592cm" svg:x="7.263cm" svg:y="1.023cm">
              <draw:image xlink:href="Pictures/100000010000005C0000003932724199B216454B.png" xlink:type="simple" xlink:show="embed" xlink:actuate="onLoad" draw:mime-type="image/png">
                <text:p/>
              </draw:image>
            </draw:frame>
          </table:table-cell>
        </table:table-row>
        <table:table-row table:style-name="ro29">
          <table:table-cell office:value-type="string" calcext:value-type="string">
            <text:p>Sling</text:p>
          </table:table-cell>
          <table:table-cell>
            <draw:frame table:end-cell-address="Notes.B29" table:end-x="13.251cm" table:end-y="6.257cm" draw:z-index="4" draw:name="Bild 5" draw:style-name="gr1" draw:text-style-name="P1" svg:width="4.861cm" svg:height="5.586cm" svg:x="8.39cm" svg:y="0.671cm">
              <draw:image xlink:href="Pictures/10000001000000430000004D323919B3580F3D80.png" xlink:type="simple" xlink:show="embed" xlink:actuate="onLoad" draw:mime-type="image/png">
                <text:p/>
              </draw:image>
            </draw:frame>
          </table:table-cell>
        </table:table-row>
        <table:table-row table:style-name="ro30">
          <table:table-cell office:value-type="string" calcext:value-type="string">
            <text:p>Spear</text:p>
          </table:table-cell>
          <table:table-cell table:style-name="ce14">
            <draw:frame table:end-cell-address="Notes.B30" table:end-x="12.463cm" table:end-y="6.416cm" draw:z-index="3" draw:name="Bild 3" draw:style-name="gr1" draw:text-style-name="P1" svg:width="3.152cm" svg:height="5.904cm" svg:x="9.311cm" svg:y="0.512cm">
              <draw:image xlink:href="Pictures/100000010000005E000000B0AAC37F26779904C3.png" xlink:type="simple" xlink:show="embed" xlink:actuate="onLoad" draw:mime-type="image/png">
                <text:p/>
              </draw:image>
            </draw:frame>
          </table:table-cell>
        </table:table-row>
        <table:table-row table:style-name="ro31">
          <table:table-cell office:value-type="string" calcext:value-type="string">
            <text:p>One-Handed Sword: Short</text:p>
          </table:table-cell>
          <table:table-cell>
            <draw:frame table:end-cell-address="Notes.B31" table:end-x="12.844cm" table:end-y="4.535cm" draw:z-index="2" draw:name="Bild 4" draw:style-name="gr1" draw:text-style-name="P1" svg:width="4.14cm" svg:height="4.248cm" svg:x="8.704cm" svg:y="0.287cm">
              <draw:image xlink:href="Pictures/100000010000005100000053EF8039FFA6A77693.png" xlink:type="simple" xlink:show="embed" xlink:actuate="onLoad" draw:mime-type="image/png">
                <text:p/>
              </draw:image>
            </draw:frame>
          </table:table-cell>
        </table:table-row>
        <table:table-row table:style-name="ro32">
          <table:table-cell office:value-type="string" calcext:value-type="string">
            <text:p>War Hammer</text:p>
          </table:table-cell>
          <table:table-cell>
            <draw:frame table:end-cell-address="Notes.B32" table:end-x="13.517cm" table:end-y="5.955cm" draw:z-index="1" draw:name="Bild 2" draw:style-name="gr1" draw:text-style-name="P1" svg:width="5.279cm" svg:height="5.399cm" svg:x="8.238cm" svg:y="0.556cm">
              <draw:image xlink:href="Pictures/100000010000005700000059530B03A95EDBE66F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INI resref_weapon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24"/>
        <table:table-column table:style-name="co6" table:default-cell-style-name="ce8"/>
        <table:table-column table:style-name="co7" table:default-cell-style-name="ce30"/>
        <table:table-column table:style-name="co8" table:number-columns-repeated="1017" table:default-cell-style-name="ce10"/>
        <table:table-column table:style-name="co3" table:number-columns-repeated="3" table:default-cell-style-name="ce10"/>
        <table:table-row table:style-name="ro34">
          <table:table-cell table:style-name="ce1" office:value-type="string" calcext:value-type="string">
            <text:p>Value (ASCII)</text:p>
          </table:table-cell>
          <table:table-cell table:style-name="ce4" office:value-type="string" calcext:value-type="string">
            <text:p>Enhanced Editions Description</text:p>
          </table:table-cell>
          <table:table-cell table:style-name="ce7" office:value-type="string" calcext:value-type="string">
            <text:p>Results</text:p>
          </table:table-cell>
          <table:table-cell table:style-name="ce29"/>
          <table:table-cell table:number-columns-repeated="1020"/>
        </table:table-row>
        <table:table-row table:style-name="ro34">
          <table:table-cell table:style-name="ce2" office:value-type="string" calcext:value-type="string">
            <text:p>"  "</text:p>
          </table:table-cell>
          <table:table-cell table:style-name="ce22" office:value-type="string" calcext:value-type="string">
            <text:p>No animation</text:p>
          </table:table-cell>
          <table:table-cell table:style-name="ce20" office:value-type="string" calcext:value-type="string">
            <text:p><text:s/>--- 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AX</text:p>
          </table:table-cell>
          <table:table-cell table:style-name="ce22" office:value-type="string" calcext:value-type="string">
            <text:p>Axe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BS</text:p>
          </table:table-cell>
          <table:table-cell table:style-name="ce22" office:value-type="string" calcext:value-type="string">
            <text:p>Shortbow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BW</text:p>
          </table:table-cell>
          <table:table-cell table:style-name="ce22" office:value-type="string" calcext:value-type="string">
            <text:p>Longbow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CB</text:p>
          </table:table-cell>
          <table:table-cell table:style-name="ce22" office:value-type="string" calcext:value-type="string">
            <text:p>Crossbow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CL</text:p>
          </table:table-cell>
          <table:table-cell table:style-name="ce22" office:value-type="string" calcext:value-type="string">
            <text:p>Club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DD</text:p>
          </table:table-cell>
          <table:table-cell table:style-name="ce22" office:value-type="string" calcext:value-type="string">
            <text:p>Dagger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F0</text:p>
          </table:table-cell>
          <table:table-cell table:style-name="ce22" office:value-type="string" calcext:value-type="string">
            <text:p>Flail (alternate 1)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F1</text:p>
          </table:table-cell>
          <table:table-cell table:style-name="ce22" office:value-type="string" calcext:value-type="string">
            <text:p>Flail (alternate 2)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F2</text:p>
          </table:table-cell>
          <table:table-cell table:style-name="ce22" office:value-type="string" calcext:value-type="string">
            <text:p>Flaming Short Sword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F3</text:p>
          </table:table-cell>
          <table:table-cell table:style-name="ce22" office:value-type="string" calcext:value-type="string">
            <text:p>Flail (alternate 3)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FL</text:p>
          </table:table-cell>
          <table:table-cell table:style-name="ce22" office:value-type="string" calcext:value-type="string">
            <text:p>Flail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FS</text:p>
          </table:table-cell>
          <table:table-cell table:style-name="ce22" office:value-type="string" calcext:value-type="string">
            <text:p>Flaming Long Sword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GS</text:p>
          </table:table-cell>
          <table:table-cell table:style-name="ce22" office:value-type="string" calcext:value-type="string">
            <text:p>Glowing Staff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HB</text:p>
          </table:table-cell>
          <table:table-cell table:style-name="ce22" office:value-type="string" calcext:value-type="string">
            <text:p>Halberd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M2</text:p>
          </table:table-cell>
          <table:table-cell table:style-name="ce22" office:value-type="string" calcext:value-type="string">
            <text:p>Mace (alternate)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MC</text:p>
          </table:table-cell>
          <table:table-cell table:style-name="ce22" office:value-type="string" calcext:value-type="string">
            <text:p>Mace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MS</text:p>
          </table:table-cell>
          <table:table-cell table:style-name="ce22" office:value-type="string" calcext:value-type="string">
            <text:p>Morning Star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Q2</text:p>
          </table:table-cell>
          <table:table-cell table:style-name="ce22" office:value-type="string" calcext:value-type="string">
            <text:p>Quarterstaff (alternate 1)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Q3</text:p>
          </table:table-cell>
          <table:table-cell table:style-name="ce22" office:value-type="string" calcext:value-type="string">
            <text:p>Quarterstaff (alternate 2)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Q4</text:p>
          </table:table-cell>
          <table:table-cell table:style-name="ce22" office:value-type="string" calcext:value-type="string">
            <text:p>Quarterstaff (alternate 3)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QS</text:p>
          </table:table-cell>
          <table:table-cell table:style-name="ce22" office:value-type="string" calcext:value-type="string">
            <text:p>Quarterstaff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S0</text:p>
          </table:table-cell>
          <table:table-cell table:style-name="ce22" office:value-type="string" calcext:value-type="string">
            <text:p>One-Handed Sword: Bastard</text:p>
          </table:table-cell>
          <table:table-cell table:style-name="ce35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S1</text:p>
          </table:table-cell>
          <table:table-cell table:style-name="ce22" office:value-type="string" calcext:value-type="string">
            <text:p>One-Handed Sword: Broad/Long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S2</text:p>
          </table:table-cell>
          <table:table-cell table:style-name="ce22" office:value-type="string" calcext:value-type="string">
            <text:p>Twp-Handed Sword</text:p>
          </table:table-cell>
          <table:table-cell table:style-name="ce18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S3</text:p>
          </table:table-cell>
          <table:table-cell table:style-name="ce22" office:value-type="string" calcext:value-type="string">
            <text:p>One-Handed Sword: Katana</text:p>
          </table:table-cell>
          <table:table-cell table:style-name="ce18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SC</text:p>
          </table:table-cell>
          <table:table-cell table:style-name="ce22" office:value-type="string" calcext:value-type="string">
            <text:p>One-Handed Sword: Scimitar</text:p>
          </table:table-cell>
          <table:table-cell table:style-name="ce18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SL</text:p>
          </table:table-cell>
          <table:table-cell table:style-name="ce22" office:value-type="string" calcext:value-type="string">
            <text:p>Sling</text:p>
          </table:table-cell>
          <table:table-cell table:style-name="ce18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SP</text:p>
          </table:table-cell>
          <table:table-cell table:style-name="ce22" office:value-type="string" calcext:value-type="string">
            <text:p>Spear</text:p>
          </table:table-cell>
          <table:table-cell table:style-name="ce18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SS</text:p>
          </table:table-cell>
          <table:table-cell table:style-name="ce22" office:value-type="string" calcext:value-type="string">
            <text:p>One-Handed Sword: Short</text:p>
          </table:table-cell>
          <table:table-cell table:style-name="ce18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 office:value-type="string" calcext:value-type="string">
            <text:p>WH</text:p>
          </table:table-cell>
          <table:table-cell table:style-name="ce22" office:value-type="string" calcext:value-type="string">
            <text:p>War Hammer</text:p>
          </table:table-cell>
          <table:table-cell table:style-name="ce18" office:value-type="string" calcext:value-type="string">
            <text:p>Not tested(possibly visible)</text:p>
          </table:table-cell>
          <table:table-cell table:number-columns-repeated="1021"/>
        </table:table-row>
        <table:table-row table:style-name="ro34">
          <table:table-cell table:style-name="ce2"/>
          <table:table-cell table:style-name="ce22"/>
          <table:table-cell table:style-name="ce26"/>
          <table:table-cell table:number-columns-repeated="1021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kin Calhan</meta:initial-creator>
    <meta:creation-date>2015-06-05T18:19:34</meta:creation-date>
    <dc:date>2026-07-08T17:42:39.458000000</dc:date>
    <meta:generator>LibreOffice/7.3.5.2$Windows_X86_64 LibreOffice_project/184fe81b8c8c30d8b5082578aee2fed2ea847c01</meta:generator>
    <meta:editing-duration>P5DT12H37M15S</meta:editing-duration>
    <meta:editing-cycles>58</meta:editing-cycles>
    <meta:document-statistic meta:table-count="2" meta:cell-count="130" meta:object-count="31"/>
    <meta:user-defined meta:name="AppVersion">16.0300</meta:user-defined>
  </office:meta>
</office:document-meta>
</file>