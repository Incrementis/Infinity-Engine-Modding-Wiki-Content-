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A00000050409DE4534996F6CC.png" manifest:media-type="image/png"/>
  <manifest:file-entry manifest:full-path="Pictures/1000000100000199000000B5723A552589C6E3BF.png" manifest:media-type="image/png"/>
  <manifest:file-entry manifest:full-path="Pictures/100000010000007B00000067CD054F45B6A2B216.png" manifest:media-type="image/png"/>
  <manifest:file-entry manifest:full-path="Pictures/100000010000004A000000485EC90B32677AF392.png" manifest:media-type="image/png"/>
  <manifest:file-entry manifest:full-path="Pictures/10000001000000670000006618CFA7DC78B3CA06.png" manifest:media-type="image/png"/>
  <manifest:file-entry manifest:full-path="Pictures/10000001000000430000006DDBFF0C1FD526E2C0.png" manifest:media-type="image/png"/>
  <manifest:file-entry manifest:full-path="Pictures/100000010000005100000053EF8039FFA6A77693.png" manifest:media-type="image/png"/>
  <manifest:file-entry manifest:full-path="Pictures/100000010000007C000000469EB43A65FC072309.png" manifest:media-type="image/png"/>
  <manifest:file-entry manifest:full-path="Pictures/1000000100000037000000452645441A4F0C63D1.png" manifest:media-type="image/png"/>
  <manifest:file-entry manifest:full-path="Pictures/1000000100000038000000526333752A4699025C.png" manifest:media-type="image/png"/>
  <manifest:file-entry manifest:full-path="Pictures/100000010000006C00000062A4A1EF84798DE038.png" manifest:media-type="image/png"/>
  <manifest:file-entry manifest:full-path="Pictures/100000010000005A00000042AA2105B3E9D40855.png" manifest:media-type="image/png"/>
  <manifest:file-entry manifest:full-path="Pictures/10000001000000430000004D323919B3580F3D80.png" manifest:media-type="image/png"/>
  <manifest:file-entry manifest:full-path="Pictures/100000010000004000000090A7B6046F7368838A.png" manifest:media-type="image/png"/>
  <manifest:file-entry manifest:full-path="Pictures/100000010000008700000076A658C68909680CED.png" manifest:media-type="image/png"/>
  <manifest:file-entry manifest:full-path="Pictures/1000000100000061000000877E06D755BD8F7048.png" manifest:media-type="image/png"/>
  <manifest:file-entry manifest:full-path="Pictures/100000010000005D0000004F50D6C8EE827BAAA4.png" manifest:media-type="image/png"/>
  <manifest:file-entry manifest:full-path="Pictures/100000010000005100000044FAA6104196379B2F.png" manifest:media-type="image/png"/>
  <manifest:file-entry manifest:full-path="Pictures/100000010000005C0000003932724199B216454B.png" manifest:media-type="image/png"/>
  <manifest:file-entry manifest:full-path="Pictures/100000010000005E000000B0AAC37F26779904C3.png" manifest:media-type="image/png"/>
  <manifest:file-entry manifest:full-path="Pictures/100000010000005700000059530B03A95EDBE6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414cm"/>
    </style:style>
    <style:style style:name="co2" style:family="table-column">
      <style:table-column-properties fo:break-before="auto" style:column-width="20.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91cm"/>
    </style:style>
    <style:style style:name="co5" style:family="table-column">
      <style:table-column-properties fo:break-before="auto" style:column-width="12.353cm"/>
    </style:style>
    <style:style style:name="co6" style:family="table-column">
      <style:table-column-properties fo:break-before="auto" style:column-width="10.269cm"/>
    </style:style>
    <style:style style:name="co7" style:family="table-column">
      <style:table-column-properties fo:break-before="auto" style:column-width="12.342cm"/>
    </style:style>
    <style:style style:name="co8" style:family="table-column">
      <style:table-column-properties fo:break-before="auto" style:column-width="1.674cm"/>
    </style:style>
    <style:style style:name="ro1" style:family="table-row">
      <style:table-row-properties style:row-height="5.2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9.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9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3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30pt" style:language-asian="zh" style:country-asian="CN" style:font-style-asian="normal" style:font-weight-asian="norm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bf00" fo:border="0.74pt solid #000000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justify" fo:margin-left="0cm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a933" fo:wrap-option="wrap" fo:border="0.74pt solid #000000"/>
      <style:text-properties style:text-outline="false" style:text-line-through-style="none" style:text-line-through-type="none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e8cb" fo:border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4c7dc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dee6ef" fo:border="0.74pt solid #000000"/>
      <style:text-properties fo:color="#ff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fo:border="0.74pt solid #000000"/>
      <style:text-properties fo:color="#00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fo:border="0.74pt solid #000000"/>
      <style:text-properties fo:color="#158466" fo:font-size="13pt" style:font-size-asian="13pt" style:font-size-complex="13pt"/>
    </style:style>
    <style:style style:name="ce26" style:family="table-cell" style:parent-style-name="Default">
      <style:table-cell-properties fo:background-color="#dee6ef" fo:border="0.74pt solid #000000"/>
      <style:text-properties fo:color="#000000" fo:font-size="13pt" style:font-size-asian="13pt" style:font-size-complex="13pt"/>
    </style:style>
    <style:style style:name="ce27" style:family="table-cell" style:parent-style-name="Default">
      <style:table-cell-properties fo:background-color="#dee6ef" fo:border="0.74pt solid #000000"/>
      <style:text-properties fo:color="#158466" style:text-outline="false" style:text-line-through-style="none" style:text-line-through-type="none" style:font-name="Calibri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e6ef"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shapes>
          <draw:frame draw:z-index="0" draw:name="Bild 1" draw:style-name="gr1" draw:text-style-name="P1" svg:width="10.821cm" svg:height="4.788cm" svg:x="0cm" svg:y="0cm">
            <draw:image xlink:href="Pictures/1000000100000199000000B5723A552589C6E3B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13"/>
        <table:table-row table:style-name="ro1">
          <table:table-cell table:style-name="Default" office:value-type="string" calcext:value-type="string">
            <text:p>Image taken from Near Infinty.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WEAPONS</text:p>
          </table:table-cell>
          <table:table-cell table:style-name="ce12" office:value-type="string" calcext:value-type="string">
            <text:p>REPLACEMENT COLORS</text:p>
          </table:table-cell>
        </table:table-row>
        <table:table-row table:style-name="ro3">
          <table:table-cell office:value-type="string" calcext:value-type="string">
            <text:p>Axe</text:p>
          </table:table-cell>
          <table:table-cell>
            <draw:frame table:end-cell-address="Notes.B3" table:end-x="13.636cm" table:end-y="8.886cm" draw:z-index="30" draw:name="Bild 31" draw:style-name="gr1" draw:text-style-name="P1" svg:width="6.004cm" svg:height="8.558cm" svg:x="7.632cm" svg:y="0.328cm">
              <draw:image xlink:href="Pictures/100000010000004A000000485EC90B32677AF392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Shortbow</text:p>
          </table:table-cell>
          <table:table-cell>
            <draw:frame table:end-cell-address="Notes.B4" table:end-x="12.354cm" table:end-y="8.817cm" draw:z-index="29" draw:name="Bild 30" draw:style-name="gr1" draw:text-style-name="P1" svg:width="4.163cm" svg:height="8.774cm" svg:x="8.191cm" svg:y="0.043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Longbow</text:p>
          </table:table-cell>
          <table:table-cell>
            <draw:frame table:end-cell-address="Notes.B5" table:end-x="12.262cm" table:end-y="8.77cm" draw:z-index="28" draw:name="Bild 29" draw:style-name="gr1" draw:text-style-name="P1" svg:width="4.163cm" svg:height="8.559cm" svg:x="8.099cm" svg:y="0.211cm">
              <draw:image xlink:href="Pictures/10000001000000430000006DDBFF0C1FD526E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Crossbow</text:p>
          </table:table-cell>
          <table:table-cell>
            <draw:frame table:end-cell-address="Notes.B6" table:end-x="12.737cm" table:end-y="8.626cm" draw:z-index="27" draw:name="Bild 28" draw:style-name="gr1" draw:text-style-name="P1" svg:width="5.15cm" svg:height="8.154cm" svg:x="7.587cm" svg:y="0.472cm">
              <draw:image xlink:href="Pictures/100000010000004A00000050409DE4534996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Club</text:p>
          </table:table-cell>
          <table:table-cell>
            <draw:frame table:end-cell-address="Notes.B7" table:end-x="14.075cm" table:end-y="7.635cm" draw:z-index="26" draw:name="Bild 27" draw:style-name="gr1" draw:text-style-name="P1" svg:width="8.113cm" svg:height="6.703cm" svg:x="5.962cm" svg:y="0.932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Dagger</text:p>
          </table:table-cell>
          <table:table-cell>
            <draw:frame table:end-cell-address="Notes.B8" table:end-x="11.804cm" table:end-y="9.009cm" draw:z-index="25" draw:name="Bild 26" draw:style-name="gr1" draw:text-style-name="P1" svg:width="4.842cm" svg:height="8.896cm" svg:x="6.962cm" svg:y="0.113cm">
              <draw:image xlink:href="Pictures/1000000100000037000000452645441A4F0C63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il (alternate 1)</text:p>
          </table:table-cell>
          <table:table-cell>
            <draw:frame table:end-cell-address="Notes.B9" table:end-x="12.894cm" table:end-y="8.675cm" draw:z-index="24" draw:name="Bild 25" draw:style-name="gr1" draw:text-style-name="P1" svg:width="6.514cm" svg:height="7.988cm" svg:x="6.38cm" svg:y="0.68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il (alternate 2)</text:p>
          </table:table-cell>
          <table:table-cell>
            <draw:frame table:end-cell-address="Notes.B10" table:end-x="13.031cm" table:end-y="8.555cm" draw:z-index="23" draw:name="Bild 24" draw:style-name="gr1" draw:text-style-name="P1" svg:width="6.514cm" svg:height="7.988cm" svg:x="6.517cm" svg:y="0.567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ming Short Sword</text:p>
          </table:table-cell>
          <table:table-cell>
            <draw:frame table:end-cell-address="Notes.B11" table:end-x="11.313cm" table:end-y="8.334cm" draw:z-index="22" draw:name="Bild 23" draw:style-name="gr1" draw:text-style-name="P1" svg:width="3.775cm" svg:height="8.097cm" svg:x="7.538cm" svg:y="0.237cm">
              <draw:image xlink:href="Pictures/1000000100000038000000526333752A469902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il (alternate 3)</text:p>
          </table:table-cell>
          <table:table-cell>
            <draw:frame table:end-cell-address="Notes.B12" table:end-x="12.501cm" table:end-y="8.621cm" draw:z-index="21" draw:name="Bild 22" draw:style-name="gr1" draw:text-style-name="P1" svg:width="6.514cm" svg:height="7.988cm" svg:x="5.987cm" svg:y="0.633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il</text:p>
          </table:table-cell>
          <table:table-cell>
            <draw:frame table:end-cell-address="Notes.B13" table:end-x="12.505cm" table:end-y="8.535cm" draw:z-index="20" draw:name="Bild 21" draw:style-name="gr1" draw:text-style-name="P1" svg:width="6.514cm" svg:height="7.989cm" svg:x="5.991cm" svg:y="0.546cm">
              <draw:image xlink:href="Pictures/100000010000007B00000067CD054F45B6A2B2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Flaming Long Sword</text:p>
          </table:table-cell>
          <table:table-cell>
            <draw:frame table:end-cell-address="Notes.B14" table:end-x="11.8cm" table:end-y="8.003cm" draw:z-index="19" draw:name="Bild 20" draw:style-name="gr1" draw:text-style-name="P1" svg:width="6.074cm" svg:height="6.522cm" svg:x="5.726cm" svg:y="1.481cm">
              <draw:image xlink:href="Pictures/100000010000005A00000042AA2105B3E9D408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Glowing Staff</text:p>
          </table:table-cell>
          <table:table-cell>
            <draw:frame table:end-cell-address="Notes.B15" table:end-x="10.748cm" table:end-y="9.156cm" draw:z-index="18" draw:name="Bild 19" draw:style-name="gr1" draw:text-style-name="P1" svg:width="2.758cm" svg:height="9.094cm" svg:x="7.99cm" svg:y="0.062cm">
              <draw:image xlink:href="Pictures/100000010000004000000090A7B6046F7368838A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Halberd</text:p>
          </table:table-cell>
          <table:table-cell>
            <draw:frame table:end-cell-address="Notes.B16" table:end-x="12.446cm" table:end-y="8.636cm" draw:z-index="17" draw:name="Bild 18" draw:style-name="gr1" draw:text-style-name="P1" svg:width="5.978cm" svg:height="7.651cm" svg:x="6.468cm" svg:y="0.985cm">
              <draw:image xlink:href="Pictures/100000010000008700000076A658C68909680CED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Mace (alternate)</text:p>
          </table:table-cell>
          <table:table-cell>
            <draw:frame table:end-cell-address="Notes.B17" table:end-x="13.662cm" table:end-y="8.136cm" draw:z-index="16" draw:name="Bild 17" draw:style-name="gr1" draw:text-style-name="P1" svg:width="8.113cm" svg:height="6.702cm" svg:x="5.549cm" svg:y="1.434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Mace</text:p>
          </table:table-cell>
          <table:table-cell>
            <draw:frame table:end-cell-address="Notes.B18" table:end-x="13.667cm" table:end-y="8.003cm" draw:z-index="15" draw:name="Bild 16" draw:style-name="gr1" draw:text-style-name="P1" svg:width="8.113cm" svg:height="6.703cm" svg:x="5.554cm" svg:y="1.3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Morning Star</text:p>
          </table:table-cell>
          <table:table-cell>
            <draw:frame table:end-cell-address="Notes.B19" table:end-x="13.605cm" table:end-y="7.853cm" draw:z-index="14" draw:name="Bild 15" draw:style-name="gr1" draw:text-style-name="P1" svg:width="8.113cm" svg:height="6.702cm" svg:x="5.492cm" svg:y="1.151cm">
              <draw:image xlink:href="Pictures/100000010000007C000000469EB43A65FC0723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Quarterstaff (alternate 1)</text:p>
          </table:table-cell>
          <table:table-cell>
            <draw:frame table:end-cell-address="Notes.B20" table:end-x="11.79cm" table:end-y="8.256cm" draw:z-index="13" draw:name="Bild 14" draw:style-name="gr1" draw:text-style-name="P1" svg:width="3.781cm" svg:height="7.706cm" svg:x="8.009cm" svg:y="0.55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Quarterstaff (alternate 2)</text:p>
          </table:table-cell>
          <table:table-cell>
            <draw:frame table:end-cell-address="Notes.B21" table:end-x="11.637cm" table:end-y="8.381cm" draw:z-index="12" draw:name="Bild 13" draw:style-name="gr1" draw:text-style-name="P1" svg:width="3.78cm" svg:height="7.705cm" svg:x="7.857cm" svg:y="0.676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Quarterstaff (alternate 3)</text:p>
          </table:table-cell>
          <table:table-cell>
            <draw:frame table:end-cell-address="Notes.B22" table:end-x="11.445cm" table:end-y="8.504cm" draw:z-index="11" draw:name="Bild 12" draw:style-name="gr1" draw:text-style-name="P1" svg:width="3.781cm" svg:height="7.706cm" svg:x="7.664cm" svg:y="0.798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Quarterstaff</text:p>
          </table:table-cell>
          <table:table-cell>
            <draw:frame table:end-cell-address="Notes.B23" table:end-x="11.261cm" table:end-y="8.412cm" draw:z-index="10" draw:name="Bild 11" draw:style-name="gr1" draw:text-style-name="P1" svg:width="3.781cm" svg:height="7.705cm" svg:x="7.48cm" svg:y="0.707cm">
              <draw:image xlink:href="Pictures/1000000100000061000000877E06D755BD8F704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ne-Handed Sword: Bastard</text:p>
          </table:table-cell>
          <table:table-cell>
            <draw:frame table:end-cell-address="Notes.B24" table:end-x="11.573cm" table:end-y="7.649cm" draw:z-index="9" draw:name="Bild 10" draw:style-name="gr1" draw:text-style-name="P1" svg:width="4.859cm" svg:height="6.044cm" svg:x="6.714cm" svg:y="1.605cm">
              <draw:image xlink:href="Pictures/100000010000005D0000004F50D6C8EE827BAAA4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ne-Handed Sword: Broad/Long</text:p>
          </table:table-cell>
          <table:table-cell>
            <draw:frame table:end-cell-address="Notes.B25" table:end-x="11.337cm" table:end-y="7.39cm" draw:z-index="8" draw:name="Bild 9" draw:style-name="gr1" draw:text-style-name="P1" svg:width="4.761cm" svg:height="5.852cm" svg:x="6.576cm" svg:y="1.538cm">
              <draw:image xlink:href="Pictures/100000010000005100000044FAA6104196379B2F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Twp-Handed Sword</text:p>
          </table:table-cell>
          <table:table-cell>
            <draw:frame table:end-cell-address="Notes.B26" table:end-x="11.762cm" table:end-y="8.065cm" draw:z-index="7" draw:name="Bild 8" draw:style-name="gr1" draw:text-style-name="P1" svg:width="5.141cm" svg:height="7.457cm" svg:x="6.621cm" svg:y="0.608cm">
              <draw:image xlink:href="Pictures/10000001000000670000006618CFA7DC78B3CA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ne-Handed Sword: Katana</text:p>
          </table:table-cell>
          <table:table-cell>
            <draw:frame table:end-cell-address="Notes.B27" table:end-x="12.022cm" table:end-y="8.161cm" draw:z-index="6" draw:name="Bild 7" draw:style-name="gr1" draw:text-style-name="P1" svg:width="5.535cm" svg:height="7.352cm" svg:x="6.487cm" svg:y="0.809cm">
              <draw:image xlink:href="Pictures/100000010000006C00000062A4A1EF84798DE03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ne-Handed Sword: Scimitar</text:p>
          </table:table-cell>
          <table:table-cell>
            <draw:frame table:end-cell-address="Notes.B28" table:end-x="12.787cm" table:end-y="7.381cm" draw:z-index="5" draw:name="Bild 6" draw:style-name="gr1" draw:text-style-name="P1" svg:width="6.78cm" svg:height="6.149cm" svg:x="6.007cm" svg:y="1.232cm">
              <draw:image xlink:href="Pictures/100000010000005C0000003932724199B21645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Sling</text:p>
          </table:table-cell>
          <table:table-cell>
            <draw:frame table:end-cell-address="Notes.B29" table:end-x="11.336cm" table:end-y="8.315cm" draw:z-index="4" draw:name="Bild 5" draw:style-name="gr1" draw:text-style-name="P1" svg:width="4.445cm" svg:height="7.479cm" svg:x="6.891cm" svg:y="0.836cm">
              <draw:image xlink:href="Pictures/10000001000000430000004D323919B3580F3D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Spear</text:p>
          </table:table-cell>
          <table:table-cell table:style-name="ce14">
            <draw:frame table:end-cell-address="Notes.B30" table:end-x="10.37cm" table:end-y="8.523cm" draw:z-index="3" draw:name="Bild 3" draw:style-name="gr1" draw:text-style-name="P1" svg:width="2.882cm" svg:height="7.905cm" svg:x="7.488cm" svg:y="0.618cm">
              <draw:image xlink:href="Pictures/100000010000005E000000B0AAC37F26779904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ne-Handed Sword: Short</text:p>
          </table:table-cell>
          <table:table-cell>
            <draw:frame table:end-cell-address="Notes.B31" table:end-x="10.767cm" table:end-y="7.195cm" draw:z-index="2" draw:name="Bild 4" draw:style-name="gr1" draw:text-style-name="P1" svg:width="3.785cm" svg:height="5.687cm" svg:x="6.982cm" svg:y="1.508cm">
              <draw:image xlink:href="Pictures/100000010000005100000053EF8039FFA6A7769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War Hammer</text:p>
          </table:table-cell>
          <table:table-cell>
            <draw:frame table:end-cell-address="Notes.B32" table:end-x="11.286cm" table:end-y="8.739cm" draw:z-index="1" draw:name="Bild 2" draw:style-name="gr1" draw:text-style-name="P1" svg:width="4.827cm" svg:height="7.229cm" svg:x="6.459cm" svg:y="1.51cm">
              <draw:image xlink:href="Pictures/100000010000005700000059530B03A95EDBE66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Default" table:number-columns-repeated="2"/>
        </table:table-row>
      </table:table>
      <table:table table:name="split_bams=1 BG2EE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6"/>
        <table:table-column table:style-name="co6" table:default-cell-style-name="ce8"/>
        <table:table-column table:style-name="co7" table:default-cell-style-name="ce30"/>
        <table:table-column table:style-name="co8" table:number-columns-repeated="1017" table:default-cell-style-name="ce10"/>
        <table:table-column table:style-name="co3" table:number-columns-repeated="3" table:default-cell-style-name="ce10"/>
        <table:table-row table:style-name="ro5">
          <table:table-cell table:style-name="ce1" office:value-type="string" calcext:value-type="string">
            <text:p>Value (ASCII)</text:p>
          </table:table-cell>
          <table:table-cell table:style-name="ce4" office:value-type="string" calcext:value-type="string">
            <text:p>Enhanced Editions Description</text:p>
          </table:table-cell>
          <table:table-cell table:style-name="ce7" office:value-type="string" calcext:value-type="string">
            <text:p>Results</text:p>
          </table:table-cell>
          <table:table-cell table:style-name="ce29"/>
          <table:table-cell table:number-columns-repeated="1020"/>
        </table:table-row>
        <table:table-row table:style-name="ro5">
          <table:table-cell table:style-name="ce2" office:value-type="string" calcext:value-type="string">
            <text:p>"  "</text:p>
          </table:table-cell>
          <table:table-cell table:style-name="ce5" office:value-type="string" calcext:value-type="string">
            <text:p>No animation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Leather Armor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2W</text:p>
          </table:table-cell>
          <table:table-cell table:style-name="ce5" office:value-type="string" calcext:value-type="string">
            <text:p>Robe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Chainmail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3W</text:p>
          </table:table-cell>
          <table:table-cell table:style-name="ce5" office:value-type="string" calcext:value-type="string">
            <text:p>Robe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Plate Mail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4W</text:p>
          </table:table-cell>
          <table:table-cell table:style-name="ce5" office:value-type="string" calcext:value-type="string">
            <text:p>Robe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AX</text:p>
          </table:table-cell>
          <table:table-cell table:style-name="ce15" office:value-type="string" calcext:value-type="string">
            <text:p>Axe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BS</text:p>
          </table:table-cell>
          <table:table-cell table:style-name="ce15" office:value-type="string" calcext:value-type="string">
            <text:p>Short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BW</text:p>
          </table:table-cell>
          <table:table-cell table:style-name="ce15" office:value-type="string" calcext:value-type="string">
            <text:p>Long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0</text:p>
          </table:table-cell>
          <table:table-cell table:style-name="ce5" office:value-type="string" calcext:value-type="string">
            <text:p>Small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Medium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Large Shield (alternate 1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Medium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Small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5</text:p>
          </table:table-cell>
          <table:table-cell table:style-name="ce5" office:value-type="string" calcext:value-type="string">
            <text:p>Large Shield (alternate 2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6</text:p>
          </table:table-cell>
          <table:table-cell table:style-name="ce5" office:value-type="string" calcext:value-type="string">
            <text:p>Large Shield (alternate 3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7</text:p>
          </table:table-cell>
          <table:table-cell table:style-name="ce5" office:value-type="string" calcext:value-type="string">
            <text:p>Medium Shield (alternate 3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B</text:p>
          </table:table-cell>
          <table:table-cell table:style-name="ce15" office:value-type="string" calcext:value-type="string">
            <text:p>Crossbow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CL</text:p>
          </table:table-cell>
          <table:table-cell table:style-name="ce15" office:value-type="string" calcext:value-type="string">
            <text:p>Club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Buckler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Shield (Small)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3</text:p>
          </table:table-cell>
          <table:table-cell table:style-name="ce5" office:value-type="string" calcext:value-type="string">
            <text:p>Shield (Medium)</text:p>
          </table:table-cell>
          <table:table-cell table:style-name="ce23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Shield (Large)</text:p>
          </table:table-cell>
          <table:table-cell table:style-name="ce26" office:value-type="string" calcext:value-type="string">
            <text:p>In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D</text:p>
          </table:table-cell>
          <table:table-cell table:style-name="ce15" office:value-type="string" calcext:value-type="string">
            <text:p>Dagg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0</text:p>
          </table:table-cell>
          <table:table-cell table:style-name="ce15" office:value-type="string" calcext:value-type="string">
            <text:p>Flail (alternate 1)</text:p>
          </table:table-cell>
          <table:table-cell table:style-name="ce27" office:value-type="string" calcext:value-type="string">
            <text:p>Visible(one long head -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1</text:p>
          </table:table-cell>
          <table:table-cell table:style-name="ce15" office:value-type="string" calcext:value-type="string">
            <text:p>Flail (alternate 2)</text:p>
          </table:table-cell>
          <table:table-cell table:style-name="ce27" office:value-type="string" calcext:value-type="string">
            <text:p><text:span text:style-name="T1">Visible(two long heads - Paperdoll</text:span>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2</text:p>
          </table:table-cell>
          <table:table-cell table:style-name="ce15" office:value-type="string" calcext:value-type="string">
            <text:p>Flaming Short Sword</text:p>
          </table:table-cell>
          <table:table-cell table:style-name="ce27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3</text:p>
          </table:table-cell>
          <table:table-cell table:style-name="ce15" office:value-type="string" calcext:value-type="string">
            <text:p>Flail (alternate 3)</text:p>
          </table:table-cell>
          <table:table-cell table:style-name="ce27" office:value-type="string" calcext:value-type="string">
            <text:p>Visible(three long heads -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L</text:p>
          </table:table-cell>
          <table:table-cell table:style-name="ce15" office:value-type="string" calcext:value-type="string">
            <text:p>Flail</text:p>
          </table:table-cell>
          <table:table-cell table:style-name="ce20" office:value-type="string" calcext:value-type="string">
            <text:p>Visible(one round head –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S</text:p>
          </table:table-cell>
          <table:table-cell table:style-name="ce15" office:value-type="string" calcext:value-type="string">
            <text:p>Flaming Long Swo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GS</text:p>
          </table:table-cell>
          <table:table-cell table:style-name="ce15" office:value-type="string" calcext:value-type="string">
            <text:p>Glowing Staff</text:p>
          </table:table-cell>
          <table:table-cell table:style-name="ce27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0</text:p>
          </table:table-cell>
          <table:table-cell table:style-name="ce5" office:value-type="string" calcext:value-type="string">
            <text:p>Helmet: Smooth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1</text:p>
          </table:table-cell>
          <table:table-cell table:style-name="ce5" office:value-type="string" calcext:value-type="string">
            <text:p>Helmet: Five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2</text:p>
          </table:table-cell>
          <table:table-cell table:style-name="ce5" office:value-type="string" calcext:value-type="string">
            <text:p>Helmet: Feather Wing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3</text:p>
          </table:table-cell>
          <table:table-cell table:style-name="ce5" office:value-type="string" calcext:value-type="string">
            <text:p>Helmet: Curved Sidebar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4</text:p>
          </table:table-cell>
          <table:table-cell table:style-name="ce5" office:value-type="string" calcext:value-type="string">
            <text:p>Helmet: Horned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5</text:p>
          </table:table-cell>
          <table:table-cell table:style-name="ce5" office:value-type="string" calcext:value-type="string">
            <text:p>Helmet: Center Cres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H6</text:p>
          </table:table-cell>
          <table:table-cell table:style-name="ce5" office:value-type="string" calcext:value-type="string">
            <text:p>Helmet: Large Curved Horns (incorrect paperdoll, unused)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0</text:p>
          </table:table-cell>
          <table:table-cell table:style-name="ce5" office:value-type="string" calcext:value-type="string">
            <text:p>Helmet: Smooth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Helmet: Five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Helmet: Feather Wings with Spik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Helmet: Curved Sidebar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Helmet: Small Horn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5</text:p>
          </table:table-cell>
          <table:table-cell table:style-name="ce5" office:value-type="string" calcext:value-type="string">
            <text:p>Helmet: Center Cres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6</text:p>
          </table:table-cell>
          <table:table-cell table:style-name="ce5" office:value-type="string" calcext:value-type="string">
            <text:p>Helmet: Smooth, Two Small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7</text:p>
          </table:table-cell>
          <table:table-cell table:style-name="ce5" office:value-type="string" calcext:value-type="string">
            <text:p>Helmet: Large Horizontal Horn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8</text:p>
          </table:table-cell>
          <table:table-cell table:style-name="ce5" office:value-type="string" calcext:value-type="string">
            <text:p>Helmet: Feather Wings without Spik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9</text:p>
          </table:table-cell>
          <table:table-cell table:style-name="ce5" office:value-type="string" calcext:value-type="string">
            <text:p>Helmet: Full Face, Large Horn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Helmet: Dragon Wings, Plume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B</text:p>
          </table:table-cell>
          <table:table-cell table:style-name="ce5" office:value-type="string" calcext:value-type="string">
            <text:p>Circlet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JC</text:p>
          </table:table-cell>
          <table:table-cell table:style-name="ce5" office:value-type="string" calcext:value-type="string">
            <text:p>Helmet: Dragon Wings</text:p>
          </table:table-cell>
          <table:table-cell table:style-name="ce18" office:value-type="string" calcext:value-type="string">
            <text:p>Unknown(possibly invisible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B</text:p>
          </table:table-cell>
          <table:table-cell table:style-name="ce15" office:value-type="string" calcext:value-type="string">
            <text:p>Halbe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M2</text:p>
          </table:table-cell>
          <table:table-cell table:style-name="ce15" office:value-type="string" calcext:value-type="string">
            <text:p>Mace (alternate)</text:p>
          </table:table-cell>
          <table:table-cell table:style-name="ce20" office:value-type="string" calcext:value-type="string">
            <text:p>Visible(complex head and hilt –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MC</text:p>
          </table:table-cell>
          <table:table-cell table:style-name="ce15" office:value-type="string" calcext:value-type="string">
            <text:p>Mace</text:p>
          </table:table-cell>
          <table:table-cell table:style-name="ce20" office:value-type="string" calcext:value-type="string">
            <text:p><text:span text:style-name="T1">Visible(simple head and hilt - Paperdoll</text:span>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MS</text:p>
          </table:table-cell>
          <table:table-cell table:style-name="ce15" office:value-type="string" calcext:value-type="string">
            <text:p>Morning St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Q2</text:p>
          </table:table-cell>
          <table:table-cell table:style-name="ce15" office:value-type="string" calcext:value-type="string">
            <text:p>Quarterstaff (alternate 1)</text:p>
          </table:table-cell>
          <table:table-cell table:style-name="ce27" office:value-type="string" calcext:value-type="string">
            <text:p>Visible(steel and gold -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Q3</text:p>
          </table:table-cell>
          <table:table-cell table:style-name="ce15" office:value-type="string" calcext:value-type="string">
            <text:p>Quarterstaff (alternate 2)</text:p>
          </table:table-cell>
          <table:table-cell table:style-name="ce27" office:value-type="string" calcext:value-type="string">
            <text:p>Visible(root like hilt -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Q4</text:p>
          </table:table-cell>
          <table:table-cell table:style-name="ce15" office:value-type="string" calcext:value-type="string">
            <text:p>Quarterstaff (alternate 3)</text:p>
          </table:table-cell>
          <table:table-cell table:style-name="ce27" office:value-type="string" calcext:value-type="string">
            <text:p>Visible(crooked head, bottom and hilt –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QS</text:p>
          </table:table-cell>
          <table:table-cell table:style-name="ce15" office:value-type="string" calcext:value-type="string">
            <text:p>Quarterstaff</text:p>
          </table:table-cell>
          <table:table-cell table:style-name="ce20" office:value-type="string" calcext:value-type="string">
            <text:p>Visible(wood – Paperdoll)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0</text:p>
          </table:table-cell>
          <table:table-cell table:style-name="ce15" office:value-type="string" calcext:value-type="string">
            <text:p>One-Handed Sword: Basta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1</text:p>
          </table:table-cell>
          <table:table-cell table:style-name="ce15" office:value-type="string" calcext:value-type="string">
            <text:p>One-Handed Sword: Broad/Long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2</text:p>
          </table:table-cell>
          <table:table-cell table:style-name="ce15" office:value-type="string" calcext:value-type="string">
            <text:p>Twp-Handed Sword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3</text:p>
          </table:table-cell>
          <table:table-cell table:style-name="ce15" office:value-type="string" calcext:value-type="string">
            <text:p>One-Handed Sword: Katana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C</text:p>
          </table:table-cell>
          <table:table-cell table:style-name="ce15" office:value-type="string" calcext:value-type="string">
            <text:p>One-Handed Sword: Scimit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L</text:p>
          </table:table-cell>
          <table:table-cell table:style-name="ce15" office:value-type="string" calcext:value-type="string">
            <text:p>Sling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Spea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S</text:p>
          </table:table-cell>
          <table:table-cell table:style-name="ce15" office:value-type="string" calcext:value-type="string">
            <text:p>One-Handed Sword: Short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WH</text:p>
          </table:table-cell>
          <table:table-cell table:style-name="ce15" office:value-type="string" calcext:value-type="string">
            <text:p>War Hammer</text:p>
          </table:table-cell>
          <table:table-cell table:style-name="ce20" office:value-type="string" calcext:value-type="string">
            <text:p>Visib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ZW</text:p>
          </table:table-cell>
          <table:table-cell table:style-name="ce5" office:value-type="string" calcext:value-type="string">
            <text:p>Wings (female)</text:p>
          </table:table-cell>
          <table:table-cell table:style-name="ce26" office:value-type="string" calcext:value-type="string">
            <text:p>Invisible</text:p>
          </table:table-cell>
          <table:table-cell table:number-columns-repeated="1021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kin Calhan</meta:initial-creator>
    <meta:creation-date>2015-06-05T18:19:34</meta:creation-date>
    <dc:date>2026-06-17T18:54:03.163000000</dc:date>
    <meta:generator>LibreOffice/7.3.5.2$Windows_X86_64 LibreOffice_project/184fe81b8c8c30d8b5082578aee2fed2ea847c01</meta:generator>
    <meta:editing-duration>PT14H11M52S</meta:editing-duration>
    <meta:editing-cycles>35</meta:editing-cycles>
    <meta:document-statistic meta:table-count="2" meta:cell-count="246" meta:object-count="31"/>
    <meta:user-defined meta:name="AppVersion">16.0300</meta:user-defined>
  </office:meta>
</office:document-meta>
</file>