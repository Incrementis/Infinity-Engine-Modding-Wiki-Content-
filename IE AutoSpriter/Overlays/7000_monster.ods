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A00000050409DE4534996F6CC.png" manifest:media-type="image/png"/>
  <manifest:file-entry manifest:full-path="Pictures/1000000100000199000000B5723A552589C6E3BF.png" manifest:media-type="image/png"/>
  <manifest:file-entry manifest:full-path="Pictures/100000010000007B00000067CD054F45B6A2B216.png" manifest:media-type="image/png"/>
  <manifest:file-entry manifest:full-path="Pictures/100000010000004A000000485EC90B32677AF392.png" manifest:media-type="image/png"/>
  <manifest:file-entry manifest:full-path="Pictures/10000001000000670000006618CFA7DC78B3CA06.png" manifest:media-type="image/png"/>
  <manifest:file-entry manifest:full-path="Pictures/10000001000000430000006DDBFF0C1FD526E2C0.png" manifest:media-type="image/png"/>
  <manifest:file-entry manifest:full-path="Pictures/100000010000005100000053EF8039FFA6A77693.png" manifest:media-type="image/png"/>
  <manifest:file-entry manifest:full-path="Pictures/100000010000007C000000469EB43A65FC072309.png" manifest:media-type="image/png"/>
  <manifest:file-entry manifest:full-path="Pictures/1000000100000037000000452645441A4F0C63D1.png" manifest:media-type="image/png"/>
  <manifest:file-entry manifest:full-path="Pictures/1000000100000038000000526333752A4699025C.png" manifest:media-type="image/png"/>
  <manifest:file-entry manifest:full-path="Pictures/100000010000006C00000062A4A1EF84798DE038.png" manifest:media-type="image/png"/>
  <manifest:file-entry manifest:full-path="Pictures/100000010000005A00000042AA2105B3E9D40855.png" manifest:media-type="image/png"/>
  <manifest:file-entry manifest:full-path="Pictures/10000001000000430000004D323919B3580F3D80.png" manifest:media-type="image/png"/>
  <manifest:file-entry manifest:full-path="Pictures/100000010000004000000090A7B6046F7368838A.png" manifest:media-type="image/png"/>
  <manifest:file-entry manifest:full-path="Pictures/100000010000008700000076A658C68909680CED.png" manifest:media-type="image/png"/>
  <manifest:file-entry manifest:full-path="Pictures/1000000100000061000000877E06D755BD8F7048.png" manifest:media-type="image/png"/>
  <manifest:file-entry manifest:full-path="Pictures/100000010000005D0000004F50D6C8EE827BAAA4.png" manifest:media-type="image/png"/>
  <manifest:file-entry manifest:full-path="Pictures/100000010000005100000044FAA6104196379B2F.png" manifest:media-type="image/png"/>
  <manifest:file-entry manifest:full-path="Pictures/100000010000005C0000003932724199B216454B.png" manifest:media-type="image/png"/>
  <manifest:file-entry manifest:full-path="Pictures/100000010000005E000000B0AAC37F26779904C3.png" manifest:media-type="image/png"/>
  <manifest:file-entry manifest:full-path="Pictures/100000010000005700000059530B03A95EDBE66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4" style:family="table-column">
      <style:table-column-properties fo:break-before="auto" style:column-width="6.791cm"/>
    </style:style>
    <style:style style:name="co5" style:family="table-column">
      <style:table-column-properties fo:break-before="auto" style:column-width="12.353cm"/>
    </style:style>
    <style:style style:name="co6" style:family="table-column">
      <style:table-column-properties fo:break-before="auto" style:column-width="10.269cm"/>
    </style:style>
    <style:style style:name="co7" style:family="table-column">
      <style:table-column-properties fo:break-before="auto" style:column-width="12.342cm"/>
    </style:style>
    <style:style style:name="co8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414cm"/>
    </style:style>
    <style:style style:name="co11" style:family="table-column">
      <style:table-column-properties fo:break-before="auto" style:column-width="20.72cm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5.2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9.2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00a933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fo:border="0.74pt solid #000000"/>
      <style:text-properties fo:color="#ff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fo:border="0.74pt solid #000000"/>
      <style:text-properties fo:color="#158466" fo:font-size="13pt" style:font-size-asian="13pt" style:font-size-complex="13pt"/>
    </style:style>
    <style:style style:name="ce23" style:family="table-cell" style:parent-style-name="Default">
      <style:table-cell-properties fo:background-color="#dee6ef" fo:border="0.74pt solid #000000"/>
      <style:text-properties fo:color="#00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ee6ef" fo:border="0.74pt solid #000000"/>
      <style:text-properties fo:color="#000000" fo:font-size="13pt" style:font-size-asian="13pt" style:font-size-complex="13pt"/>
    </style:style>
    <style:style style:name="ce27" style:family="table-cell" style:parent-style-name="Default">
      <style:table-cell-properties fo:background-color="#dee6ef" fo:border="0.74pt solid #000000"/>
      <style:text-properties fo:color="#158466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border="none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e8cb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e8cb" fo:border="0.74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b4c7dc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dee6ef" fo:border="0.74pt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3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30pt" style:language-asian="zh" style:country-asian="CN" style:font-style-asian="normal" style:font-weight-asian="norm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bf00" fo:border="0.74pt solid #000000"/>
    </style:style>
    <style:style style:name="ce14" style:family="table-cell" style:parent-style-name="Default">
      <style:table-cell-properties fo:background-color="#ffbf00" style:text-align-source="fix" style:repeat-content="false" fo:border="0.74pt solid #000000"/>
      <style:paragraph-properties fo:text-align="justify" fo:margin-left="0cm"/>
    </style:style>
    <style:style style:name="ce4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de8cb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a933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dde8cb" fo:border="0.74pt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b4c7dc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ackground-color="#dee6ef" fo:border="0.74pt solid #000000"/>
      <style:text-properties fo:color="#ff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dee6ef" fo:border="0.74pt solid #000000"/>
      <style:text-properties fo:color="#00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6ef" fo:border="0.74pt solid #000000"/>
      <style:text-properties fo:color="#158466" fo:font-size="13pt" style:font-size-asian="13pt" style:font-size-complex="13pt"/>
    </style:style>
    <style:style style:name="ce57" style:family="table-cell" style:parent-style-name="Default">
      <style:table-cell-properties fo:background-color="#dee6ef" fo:border="0.74pt solid #000000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ackground-color="#dee6ef" fo:border="0.74pt solid #000000"/>
      <style:text-properties fo:color="#158466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ee6ef" fo:border="0.74pt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ackground-color="transparent" fo:border="none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6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loext:opacity="100%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58466" style:font-name="Calibri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3">
        <office:forms form:automatic-focus="false" form:apply-design-mode="false"/>
        <table:shapes>
          <draw:frame draw:z-index="0" draw:name="Bild 1" draw:style-name="gr1" draw:text-style-name="P1" svg:width="10.821cm" svg:height="4.788cm" svg:x="0cm" svg:y="0cm">
            <draw:image xlink:href="Pictures/1000000100000199000000B5723A552589C6E3BF.png" xlink:type="simple" xlink:show="embed" xlink:actuate="onLoad" draw:mime-type="image/png">
              <text:p/>
            </draw:image>
          </draw:frame>
        </table:shapes>
        <table:table-column table:style-name="co10" table:default-cell-style-name="ce11"/>
        <table:table-column table:style-name="co11" table:default-cell-style-name="ce13"/>
        <table:table-row table:style-name="ro3">
          <table:table-cell table:style-name="Default" office:value-type="string" calcext:value-type="string">
            <text:p>Image taken from Near Infinty.</text:p>
          </table:table-cell>
          <table:table-cell table:style-name="ce42" office:value-type="string" calcext:value-type="string">
            <text:p>Weapon is not visible when spell is cast/conjured.</text:p>
          </table:table-cell>
        </table:table-row>
        <table:table-row table:style-name="ro4">
          <table:table-cell table:style-name="ce9" office:value-type="string" calcext:value-type="string">
            <text:p>WEAPONS</text:p>
          </table:table-cell>
          <table:table-cell table:style-name="ce12" office:value-type="string" calcext:value-type="string">
            <text:p>REPLACEMENT COLORS</text:p>
          </table:table-cell>
        </table:table-row>
        <table:table-row table:style-name="ro7">
          <table:table-cell office:value-type="string" calcext:value-type="string">
            <text:p>Axe</text:p>
          </table:table-cell>
          <table:table-cell>
            <draw:frame table:end-cell-address="Notes.B3" table:end-x="13.636cm" table:end-y="8.886cm" draw:z-index="30" draw:name="Bild 31" draw:style-name="gr1" draw:text-style-name="P1" svg:width="6.004cm" svg:height="8.558cm" svg:x="7.632cm" svg:y="0.328cm">
              <draw:image xlink:href="Pictures/100000010000004A000000485EC90B32677AF392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Shortbow</text:p>
          </table:table-cell>
          <table:table-cell>
            <draw:frame table:end-cell-address="Notes.B4" table:end-x="12.354cm" table:end-y="8.817cm" draw:z-index="29" draw:name="Bild 30" draw:style-name="gr1" draw:text-style-name="P1" svg:width="4.163cm" svg:height="8.774cm" svg:x="8.191cm" svg:y="0.043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Longbow</text:p>
          </table:table-cell>
          <table:table-cell>
            <draw:frame table:end-cell-address="Notes.B5" table:end-x="12.262cm" table:end-y="8.77cm" draw:z-index="28" draw:name="Bild 29" draw:style-name="gr1" draw:text-style-name="P1" svg:width="4.163cm" svg:height="8.559cm" svg:x="8.099cm" svg:y="0.211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Crossbow</text:p>
          </table:table-cell>
          <table:table-cell>
            <draw:frame table:end-cell-address="Notes.B6" table:end-x="12.737cm" table:end-y="8.626cm" draw:z-index="27" draw:name="Bild 28" draw:style-name="gr1" draw:text-style-name="P1" svg:width="5.15cm" svg:height="8.154cm" svg:x="7.587cm" svg:y="0.472cm">
              <draw:image xlink:href="Pictures/100000010000004A00000050409DE4534996F6CC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Club</text:p>
          </table:table-cell>
          <table:table-cell>
            <draw:frame table:end-cell-address="Notes.B7" table:end-x="14.075cm" table:end-y="7.635cm" draw:z-index="26" draw:name="Bild 27" draw:style-name="gr1" draw:text-style-name="P1" svg:width="8.113cm" svg:height="6.703cm" svg:x="5.962cm" svg:y="0.932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Dagger</text:p>
          </table:table-cell>
          <table:table-cell>
            <draw:frame table:end-cell-address="Notes.B8" table:end-x="11.804cm" table:end-y="9.009cm" draw:z-index="25" draw:name="Bild 26" draw:style-name="gr1" draw:text-style-name="P1" svg:width="4.842cm" svg:height="8.896cm" svg:x="6.962cm" svg:y="0.113cm">
              <draw:image xlink:href="Pictures/1000000100000037000000452645441A4F0C63D1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Flail (alternate 1)</text:p>
          </table:table-cell>
          <table:table-cell>
            <draw:frame table:end-cell-address="Notes.B9" table:end-x="12.894cm" table:end-y="8.675cm" draw:z-index="24" draw:name="Bild 25" draw:style-name="gr1" draw:text-style-name="P1" svg:width="6.514cm" svg:height="7.988cm" svg:x="6.38cm" svg:y="0.687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Flail (alternate 2)</text:p>
          </table:table-cell>
          <table:table-cell>
            <draw:frame table:end-cell-address="Notes.B10" table:end-x="13.031cm" table:end-y="8.555cm" draw:z-index="23" draw:name="Bild 24" draw:style-name="gr1" draw:text-style-name="P1" svg:width="6.514cm" svg:height="7.988cm" svg:x="6.517cm" svg:y="0.567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Flaming Short Sword</text:p>
          </table:table-cell>
          <table:table-cell>
            <draw:frame table:end-cell-address="Notes.B11" table:end-x="11.313cm" table:end-y="8.334cm" draw:z-index="22" draw:name="Bild 23" draw:style-name="gr1" draw:text-style-name="P1" svg:width="3.775cm" svg:height="8.097cm" svg:x="7.538cm" svg:y="0.237cm">
              <draw:image xlink:href="Pictures/1000000100000038000000526333752A4699025C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Flail (alternate 3)</text:p>
          </table:table-cell>
          <table:table-cell>
            <draw:frame table:end-cell-address="Notes.B12" table:end-x="12.501cm" table:end-y="8.621cm" draw:z-index="21" draw:name="Bild 22" draw:style-name="gr1" draw:text-style-name="P1" svg:width="6.514cm" svg:height="7.988cm" svg:x="5.987cm" svg:y="0.633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Flail</text:p>
          </table:table-cell>
          <table:table-cell>
            <draw:frame table:end-cell-address="Notes.B13" table:end-x="12.505cm" table:end-y="8.535cm" draw:z-index="20" draw:name="Bild 21" draw:style-name="gr1" draw:text-style-name="P1" svg:width="6.514cm" svg:height="7.989cm" svg:x="5.991cm" svg:y="0.546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Flaming Long Sword</text:p>
          </table:table-cell>
          <table:table-cell>
            <draw:frame table:end-cell-address="Notes.B14" table:end-x="11.8cm" table:end-y="8.003cm" draw:z-index="19" draw:name="Bild 20" draw:style-name="gr1" draw:text-style-name="P1" svg:width="6.074cm" svg:height="6.522cm" svg:x="5.726cm" svg:y="1.481cm">
              <draw:image xlink:href="Pictures/100000010000005A00000042AA2105B3E9D408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Glowing Staff</text:p>
          </table:table-cell>
          <table:table-cell>
            <draw:frame table:end-cell-address="Notes.B15" table:end-x="10.748cm" table:end-y="9.156cm" draw:z-index="18" draw:name="Bild 19" draw:style-name="gr1" draw:text-style-name="P1" svg:width="2.758cm" svg:height="9.094cm" svg:x="7.99cm" svg:y="0.062cm">
              <draw:image xlink:href="Pictures/100000010000004000000090A7B6046F7368838A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Halberd</text:p>
          </table:table-cell>
          <table:table-cell>
            <draw:frame table:end-cell-address="Notes.B16" table:end-x="12.446cm" table:end-y="8.636cm" draw:z-index="17" draw:name="Bild 18" draw:style-name="gr1" draw:text-style-name="P1" svg:width="5.978cm" svg:height="7.651cm" svg:x="6.468cm" svg:y="0.985cm">
              <draw:image xlink:href="Pictures/100000010000008700000076A658C68909680CED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Mace (alternate)</text:p>
          </table:table-cell>
          <table:table-cell>
            <draw:frame table:end-cell-address="Notes.B17" table:end-x="13.662cm" table:end-y="8.136cm" draw:z-index="16" draw:name="Bild 17" draw:style-name="gr1" draw:text-style-name="P1" svg:width="8.113cm" svg:height="6.702cm" svg:x="5.549cm" svg:y="1.434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Mace</text:p>
          </table:table-cell>
          <table:table-cell>
            <draw:frame table:end-cell-address="Notes.B18" table:end-x="13.667cm" table:end-y="8.003cm" draw:z-index="15" draw:name="Bild 16" draw:style-name="gr1" draw:text-style-name="P1" svg:width="8.113cm" svg:height="6.703cm" svg:x="5.554cm" svg:y="1.3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Morning Star</text:p>
          </table:table-cell>
          <table:table-cell>
            <draw:frame table:end-cell-address="Notes.B19" table:end-x="13.605cm" table:end-y="7.853cm" draw:z-index="14" draw:name="Bild 15" draw:style-name="gr1" draw:text-style-name="P1" svg:width="8.113cm" svg:height="6.702cm" svg:x="5.492cm" svg:y="1.151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Quarterstaff (alternate 1)</text:p>
          </table:table-cell>
          <table:table-cell>
            <draw:frame table:end-cell-address="Notes.B20" table:end-x="11.79cm" table:end-y="8.256cm" draw:z-index="13" draw:name="Bild 14" draw:style-name="gr1" draw:text-style-name="P1" svg:width="3.781cm" svg:height="7.706cm" svg:x="8.009cm" svg:y="0.55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Quarterstaff (alternate 2)</text:p>
          </table:table-cell>
          <table:table-cell>
            <draw:frame table:end-cell-address="Notes.B21" table:end-x="11.637cm" table:end-y="8.381cm" draw:z-index="12" draw:name="Bild 13" draw:style-name="gr1" draw:text-style-name="P1" svg:width="3.78cm" svg:height="7.705cm" svg:x="7.857cm" svg:y="0.676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Quarterstaff (alternate 3)</text:p>
          </table:table-cell>
          <table:table-cell>
            <draw:frame table:end-cell-address="Notes.B22" table:end-x="11.445cm" table:end-y="8.504cm" draw:z-index="11" draw:name="Bild 12" draw:style-name="gr1" draw:text-style-name="P1" svg:width="3.781cm" svg:height="7.706cm" svg:x="7.664cm" svg:y="0.798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Quarterstaff</text:p>
          </table:table-cell>
          <table:table-cell>
            <draw:frame table:end-cell-address="Notes.B23" table:end-x="11.261cm" table:end-y="8.412cm" draw:z-index="10" draw:name="Bild 11" draw:style-name="gr1" draw:text-style-name="P1" svg:width="3.781cm" svg:height="7.705cm" svg:x="7.48cm" svg:y="0.707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One-Handed Sword: Bastard</text:p>
          </table:table-cell>
          <table:table-cell>
            <draw:frame table:end-cell-address="Notes.B24" table:end-x="11.573cm" table:end-y="7.649cm" draw:z-index="9" draw:name="Bild 10" draw:style-name="gr1" draw:text-style-name="P1" svg:width="4.859cm" svg:height="6.044cm" svg:x="6.714cm" svg:y="1.605cm">
              <draw:image xlink:href="Pictures/100000010000005D0000004F50D6C8EE827BAAA4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One-Handed Sword: Broad/Long</text:p>
          </table:table-cell>
          <table:table-cell>
            <draw:frame table:end-cell-address="Notes.B25" table:end-x="11.337cm" table:end-y="7.39cm" draw:z-index="8" draw:name="Bild 9" draw:style-name="gr1" draw:text-style-name="P1" svg:width="4.761cm" svg:height="5.852cm" svg:x="6.576cm" svg:y="1.538cm">
              <draw:image xlink:href="Pictures/100000010000005100000044FAA6104196379B2F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Twp-Handed Sword</text:p>
          </table:table-cell>
          <table:table-cell>
            <draw:frame table:end-cell-address="Notes.B26" table:end-x="11.762cm" table:end-y="8.065cm" draw:z-index="7" draw:name="Bild 8" draw:style-name="gr1" draw:text-style-name="P1" svg:width="5.141cm" svg:height="7.457cm" svg:x="6.621cm" svg:y="0.608cm">
              <draw:image xlink:href="Pictures/10000001000000670000006618CFA7DC78B3CA06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One-Handed Sword: Katana</text:p>
          </table:table-cell>
          <table:table-cell>
            <draw:frame table:end-cell-address="Notes.B27" table:end-x="12.022cm" table:end-y="8.161cm" draw:z-index="6" draw:name="Bild 7" draw:style-name="gr1" draw:text-style-name="P1" svg:width="5.535cm" svg:height="7.352cm" svg:x="6.487cm" svg:y="0.809cm">
              <draw:image xlink:href="Pictures/100000010000006C00000062A4A1EF84798DE038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One-Handed Sword: Scimitar</text:p>
          </table:table-cell>
          <table:table-cell>
            <draw:frame table:end-cell-address="Notes.B28" table:end-x="12.787cm" table:end-y="7.381cm" draw:z-index="5" draw:name="Bild 6" draw:style-name="gr1" draw:text-style-name="P1" svg:width="6.78cm" svg:height="6.149cm" svg:x="6.007cm" svg:y="1.232cm">
              <draw:image xlink:href="Pictures/100000010000005C0000003932724199B216454B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Sling</text:p>
          </table:table-cell>
          <table:table-cell>
            <draw:frame table:end-cell-address="Notes.B29" table:end-x="11.336cm" table:end-y="8.315cm" draw:z-index="4" draw:name="Bild 5" draw:style-name="gr1" draw:text-style-name="P1" svg:width="4.445cm" svg:height="7.479cm" svg:x="6.891cm" svg:y="0.836cm">
              <draw:image xlink:href="Pictures/10000001000000430000004D323919B3580F3D80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Spear</text:p>
          </table:table-cell>
          <table:table-cell table:style-name="ce14">
            <draw:frame table:end-cell-address="Notes.B30" table:end-x="10.37cm" table:end-y="8.523cm" draw:z-index="3" draw:name="Bild 3" draw:style-name="gr1" draw:text-style-name="P1" svg:width="2.882cm" svg:height="7.905cm" svg:x="7.488cm" svg:y="0.618cm">
              <draw:image xlink:href="Pictures/100000010000005E000000B0AAC37F26779904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One-Handed Sword: Short</text:p>
          </table:table-cell>
          <table:table-cell>
            <draw:frame table:end-cell-address="Notes.B31" table:end-x="10.767cm" table:end-y="7.195cm" draw:z-index="2" draw:name="Bild 4" draw:style-name="gr1" draw:text-style-name="P1" svg:width="3.785cm" svg:height="5.687cm" svg:x="6.982cm" svg:y="1.508cm">
              <draw:image xlink:href="Pictures/100000010000005100000053EF8039FFA6A77693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War Hammer</text:p>
          </table:table-cell>
          <table:table-cell>
            <draw:frame table:end-cell-address="Notes.B32" table:end-x="11.286cm" table:end-y="8.739cm" draw:z-index="1" draw:name="Bild 2" draw:style-name="gr1" draw:text-style-name="P1" svg:width="4.827cm" svg:height="7.229cm" svg:x="6.459cm" svg:y="1.51cm">
              <draw:image xlink:href="Pictures/100000010000005700000059530B03A95EDBE66F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table:style-name="Default" table:number-columns-repeated="2"/>
        </table:table-row>
      </table:table>
      <table:table table:name="split_bams=1 BG2EE" table:style-name="ta2">
        <office:forms form:automatic-focus="false" form:apply-design-mode="false"/>
        <table:table-column table:style-name="co4" table:default-cell-style-name="ce48"/>
        <table:table-column table:style-name="co5" table:default-cell-style-name="ce52"/>
        <table:table-column table:style-name="co6" table:default-cell-style-name="ce59"/>
        <table:table-column table:style-name="co7" table:default-cell-style-name="ce61"/>
        <table:table-column table:style-name="co8" table:number-columns-repeated="1017" table:default-cell-style-name="ce62"/>
        <table:table-column table:style-name="co3" table:number-columns-repeated="3" table:default-cell-style-name="ce62"/>
        <table:table-row table:style-name="ro5">
          <table:table-cell table:style-name="ce46" office:value-type="string" calcext:value-type="string">
            <text:p>Value (ASCII)</text:p>
          </table:table-cell>
          <table:table-cell table:style-name="ce49" office:value-type="string" calcext:value-type="string">
            <text:p>Enhanced Editions Description</text:p>
          </table:table-cell>
          <table:table-cell table:style-name="ce53" office:value-type="string" calcext:value-type="string">
            <text:p>Results</text:p>
          </table:table-cell>
          <table:table-cell table:style-name="ce60"/>
          <table:table-cell table:number-columns-repeated="1020"/>
        </table:table-row>
        <table:table-row table:style-name="ro5">
          <table:table-cell table:style-name="ce47" office:value-type="string" calcext:value-type="string">
            <text:p>"  "</text:p>
          </table:table-cell>
          <table:table-cell table:style-name="ce50" office:value-type="string" calcext:value-type="string">
            <text:p>No animation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2A</text:p>
          </table:table-cell>
          <table:table-cell table:style-name="ce50" office:value-type="string" calcext:value-type="string">
            <text:p>Leather Armor</text:p>
          </table:table-cell>
          <table:table-cell table:style-name="ce55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2W</text:p>
          </table:table-cell>
          <table:table-cell table:style-name="ce50" office:value-type="string" calcext:value-type="string">
            <text:p>Robe</text:p>
          </table:table-cell>
          <table:table-cell table:style-name="ce55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3A</text:p>
          </table:table-cell>
          <table:table-cell table:style-name="ce50" office:value-type="string" calcext:value-type="string">
            <text:p>Chainmail</text:p>
          </table:table-cell>
          <table:table-cell table:style-name="ce55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3W</text:p>
          </table:table-cell>
          <table:table-cell table:style-name="ce50" office:value-type="string" calcext:value-type="string">
            <text:p>Robe (alternate 1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4A</text:p>
          </table:table-cell>
          <table:table-cell table:style-name="ce50" office:value-type="string" calcext:value-type="string">
            <text:p>Plate Mail</text:p>
          </table:table-cell>
          <table:table-cell table:style-name="ce55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4W</text:p>
          </table:table-cell>
          <table:table-cell table:style-name="ce50" office:value-type="string" calcext:value-type="string">
            <text:p>Robe (alternate 2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AX</text:p>
          </table:table-cell>
          <table:table-cell table:style-name="ce51" office:value-type="string" calcext:value-type="string">
            <text:p>Axe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BS</text:p>
          </table:table-cell>
          <table:table-cell table:style-name="ce51" office:value-type="string" calcext:value-type="string">
            <text:p>Shortbow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BW</text:p>
          </table:table-cell>
          <table:table-cell table:style-name="ce51" office:value-type="string" calcext:value-type="string">
            <text:p>Longbow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0</text:p>
          </table:table-cell>
          <table:table-cell table:style-name="ce50" office:value-type="string" calcext:value-type="string">
            <text:p>Small Shield (alternate 1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1</text:p>
          </table:table-cell>
          <table:table-cell table:style-name="ce50" office:value-type="string" calcext:value-type="string">
            <text:p>Medium Shield (alternate 1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2</text:p>
          </table:table-cell>
          <table:table-cell table:style-name="ce50" office:value-type="string" calcext:value-type="string">
            <text:p>Large Shield (alternate 1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3</text:p>
          </table:table-cell>
          <table:table-cell table:style-name="ce50" office:value-type="string" calcext:value-type="string">
            <text:p>Medium Shield (alternate 2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4</text:p>
          </table:table-cell>
          <table:table-cell table:style-name="ce50" office:value-type="string" calcext:value-type="string">
            <text:p>Small Shield (alternate 2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5</text:p>
          </table:table-cell>
          <table:table-cell table:style-name="ce50" office:value-type="string" calcext:value-type="string">
            <text:p>Large Shield (alternate 2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6</text:p>
          </table:table-cell>
          <table:table-cell table:style-name="ce50" office:value-type="string" calcext:value-type="string">
            <text:p>Large Shield (alternate 3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7</text:p>
          </table:table-cell>
          <table:table-cell table:style-name="ce50" office:value-type="string" calcext:value-type="string">
            <text:p>Medium Shield (alternate 3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B</text:p>
          </table:table-cell>
          <table:table-cell table:style-name="ce51" office:value-type="string" calcext:value-type="string">
            <text:p>Crossbow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CL</text:p>
          </table:table-cell>
          <table:table-cell table:style-name="ce51" office:value-type="string" calcext:value-type="string">
            <text:p>Club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D1</text:p>
          </table:table-cell>
          <table:table-cell table:style-name="ce50" office:value-type="string" calcext:value-type="string">
            <text:p>Buckler</text:p>
          </table:table-cell>
          <table:table-cell table:style-name="ce55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D2</text:p>
          </table:table-cell>
          <table:table-cell table:style-name="ce50" office:value-type="string" calcext:value-type="string">
            <text:p>Shield (Small)</text:p>
          </table:table-cell>
          <table:table-cell table:style-name="ce55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D3</text:p>
          </table:table-cell>
          <table:table-cell table:style-name="ce50" office:value-type="string" calcext:value-type="string">
            <text:p>Shield (Medium)</text:p>
          </table:table-cell>
          <table:table-cell table:style-name="ce55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D4</text:p>
          </table:table-cell>
          <table:table-cell table:style-name="ce50" office:value-type="string" calcext:value-type="string">
            <text:p>Shield (Large)</text:p>
          </table:table-cell>
          <table:table-cell table:style-name="ce57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DD</text:p>
          </table:table-cell>
          <table:table-cell table:style-name="ce51" office:value-type="string" calcext:value-type="string">
            <text:p>Dagger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F0</text:p>
          </table:table-cell>
          <table:table-cell table:style-name="ce51" office:value-type="string" calcext:value-type="string">
            <text:p>Flail (alternate 1)</text:p>
          </table:table-cell>
          <table:table-cell table:style-name="ce58" office:value-type="string" calcext:value-type="string">
            <text:p>Visible(one long head -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F1</text:p>
          </table:table-cell>
          <table:table-cell table:style-name="ce51" office:value-type="string" calcext:value-type="string">
            <text:p>Flail (alternate 2)</text:p>
          </table:table-cell>
          <table:table-cell table:style-name="ce58" office:value-type="string" calcext:value-type="string">
            <text:p><text:span text:style-name="T2">Visible(two long heads - Paperdoll</text:span>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F2</text:p>
          </table:table-cell>
          <table:table-cell table:style-name="ce51" office:value-type="string" calcext:value-type="string">
            <text:p>Flaming Short Sword</text:p>
          </table:table-cell>
          <table:table-cell table:style-name="ce58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F3</text:p>
          </table:table-cell>
          <table:table-cell table:style-name="ce51" office:value-type="string" calcext:value-type="string">
            <text:p>Flail (alternate 3)</text:p>
          </table:table-cell>
          <table:table-cell table:style-name="ce58" office:value-type="string" calcext:value-type="string">
            <text:p>Visible(three long heads -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FL</text:p>
          </table:table-cell>
          <table:table-cell table:style-name="ce51" office:value-type="string" calcext:value-type="string">
            <text:p>Flail</text:p>
          </table:table-cell>
          <table:table-cell table:style-name="ce56" office:value-type="string" calcext:value-type="string">
            <text:p>Visible(one round head –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FS</text:p>
          </table:table-cell>
          <table:table-cell table:style-name="ce51" office:value-type="string" calcext:value-type="string">
            <text:p>Flaming Long Sword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GS</text:p>
          </table:table-cell>
          <table:table-cell table:style-name="ce51" office:value-type="string" calcext:value-type="string">
            <text:p>Glowing Staff</text:p>
          </table:table-cell>
          <table:table-cell table:style-name="ce58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H0</text:p>
          </table:table-cell>
          <table:table-cell table:style-name="ce50" office:value-type="string" calcext:value-type="string">
            <text:p>Helmet: Smooth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H1</text:p>
          </table:table-cell>
          <table:table-cell table:style-name="ce50" office:value-type="string" calcext:value-type="string">
            <text:p>Helmet: Five Horn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H2</text:p>
          </table:table-cell>
          <table:table-cell table:style-name="ce50" office:value-type="string" calcext:value-type="string">
            <text:p>Helmet: Feather Wing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H3</text:p>
          </table:table-cell>
          <table:table-cell table:style-name="ce50" office:value-type="string" calcext:value-type="string">
            <text:p>Helmet: Curved Sidebar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H4</text:p>
          </table:table-cell>
          <table:table-cell table:style-name="ce50" office:value-type="string" calcext:value-type="string">
            <text:p>Helmet: Horned, Plume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H5</text:p>
          </table:table-cell>
          <table:table-cell table:style-name="ce50" office:value-type="string" calcext:value-type="string">
            <text:p>Helmet: Center Crest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6">
          <table:table-cell table:style-name="ce47" office:value-type="string" calcext:value-type="string">
            <text:p>H6</text:p>
          </table:table-cell>
          <table:table-cell table:style-name="ce50" office:value-type="string" calcext:value-type="string">
            <text:p>Helmet: Large Curved Horns (incorrect paperdoll, unused)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0</text:p>
          </table:table-cell>
          <table:table-cell table:style-name="ce50" office:value-type="string" calcext:value-type="string">
            <text:p>Helmet: Smooth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1</text:p>
          </table:table-cell>
          <table:table-cell table:style-name="ce50" office:value-type="string" calcext:value-type="string">
            <text:p>Helmet: Five Horn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2</text:p>
          </table:table-cell>
          <table:table-cell table:style-name="ce50" office:value-type="string" calcext:value-type="string">
            <text:p>Helmet: Feather Wings with Spike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3</text:p>
          </table:table-cell>
          <table:table-cell table:style-name="ce50" office:value-type="string" calcext:value-type="string">
            <text:p>Helmet: Curved Sidebar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4</text:p>
          </table:table-cell>
          <table:table-cell table:style-name="ce50" office:value-type="string" calcext:value-type="string">
            <text:p>Helmet: Small Horns, Plume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5</text:p>
          </table:table-cell>
          <table:table-cell table:style-name="ce50" office:value-type="string" calcext:value-type="string">
            <text:p>Helmet: Center Crest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6</text:p>
          </table:table-cell>
          <table:table-cell table:style-name="ce50" office:value-type="string" calcext:value-type="string">
            <text:p>Helmet: Smooth, Two Small Horn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7</text:p>
          </table:table-cell>
          <table:table-cell table:style-name="ce50" office:value-type="string" calcext:value-type="string">
            <text:p>Helmet: Large Horizontal Horn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8</text:p>
          </table:table-cell>
          <table:table-cell table:style-name="ce50" office:value-type="string" calcext:value-type="string">
            <text:p>Helmet: Feather Wings without Spike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9</text:p>
          </table:table-cell>
          <table:table-cell table:style-name="ce50" office:value-type="string" calcext:value-type="string">
            <text:p>Helmet: Full Face, Large Horns, Plume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A</text:p>
          </table:table-cell>
          <table:table-cell table:style-name="ce50" office:value-type="string" calcext:value-type="string">
            <text:p>Helmet: Dragon Wings, Plume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B</text:p>
          </table:table-cell>
          <table:table-cell table:style-name="ce50" office:value-type="string" calcext:value-type="string">
            <text:p>Circlet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JC</text:p>
          </table:table-cell>
          <table:table-cell table:style-name="ce50" office:value-type="string" calcext:value-type="string">
            <text:p>Helmet: Dragon Wings</text:p>
          </table:table-cell>
          <table:table-cell table:style-name="ce54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HB</text:p>
          </table:table-cell>
          <table:table-cell table:style-name="ce51" office:value-type="string" calcext:value-type="string">
            <text:p>Halberd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M2</text:p>
          </table:table-cell>
          <table:table-cell table:style-name="ce51" office:value-type="string" calcext:value-type="string">
            <text:p>Mace (alternate)</text:p>
          </table:table-cell>
          <table:table-cell table:style-name="ce56" office:value-type="string" calcext:value-type="string">
            <text:p>Visible(complex head and hilt –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MC</text:p>
          </table:table-cell>
          <table:table-cell table:style-name="ce51" office:value-type="string" calcext:value-type="string">
            <text:p>Mace</text:p>
          </table:table-cell>
          <table:table-cell table:style-name="ce56" office:value-type="string" calcext:value-type="string">
            <text:p><text:span text:style-name="T2">Visible(simple head and hilt - Paperdoll</text:span>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MS</text:p>
          </table:table-cell>
          <table:table-cell table:style-name="ce51" office:value-type="string" calcext:value-type="string">
            <text:p>Morning Star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Q2</text:p>
          </table:table-cell>
          <table:table-cell table:style-name="ce51" office:value-type="string" calcext:value-type="string">
            <text:p>Quarterstaff (alternate 1)</text:p>
          </table:table-cell>
          <table:table-cell table:style-name="ce58" office:value-type="string" calcext:value-type="string">
            <text:p>Visible(steel and gold -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Q3</text:p>
          </table:table-cell>
          <table:table-cell table:style-name="ce51" office:value-type="string" calcext:value-type="string">
            <text:p>Quarterstaff (alternate 2)</text:p>
          </table:table-cell>
          <table:table-cell table:style-name="ce58" office:value-type="string" calcext:value-type="string">
            <text:p>Visible(root like hilt -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Q4</text:p>
          </table:table-cell>
          <table:table-cell table:style-name="ce51" office:value-type="string" calcext:value-type="string">
            <text:p>Quarterstaff (alternate 3)</text:p>
          </table:table-cell>
          <table:table-cell table:style-name="ce58" office:value-type="string" calcext:value-type="string">
            <text:p>Visible(crooked head, bottom and hilt –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QS</text:p>
          </table:table-cell>
          <table:table-cell table:style-name="ce51" office:value-type="string" calcext:value-type="string">
            <text:p>Quarterstaff</text:p>
          </table:table-cell>
          <table:table-cell table:style-name="ce56" office:value-type="string" calcext:value-type="string">
            <text:p>Visible(wood – Paperdoll)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0</text:p>
          </table:table-cell>
          <table:table-cell table:style-name="ce51" office:value-type="string" calcext:value-type="string">
            <text:p>One-Handed Sword: Bastard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1</text:p>
          </table:table-cell>
          <table:table-cell table:style-name="ce51" office:value-type="string" calcext:value-type="string">
            <text:p>One-Handed Sword: Broad/Long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2</text:p>
          </table:table-cell>
          <table:table-cell table:style-name="ce51" office:value-type="string" calcext:value-type="string">
            <text:p>Twp-Handed Sword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3</text:p>
          </table:table-cell>
          <table:table-cell table:style-name="ce51" office:value-type="string" calcext:value-type="string">
            <text:p>One-Handed Sword: Katana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C</text:p>
          </table:table-cell>
          <table:table-cell table:style-name="ce51" office:value-type="string" calcext:value-type="string">
            <text:p>One-Handed Sword: Scimitar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L</text:p>
          </table:table-cell>
          <table:table-cell table:style-name="ce51" office:value-type="string" calcext:value-type="string">
            <text:p>Sling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P</text:p>
          </table:table-cell>
          <table:table-cell table:style-name="ce51" office:value-type="string" calcext:value-type="string">
            <text:p>Spear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SS</text:p>
          </table:table-cell>
          <table:table-cell table:style-name="ce51" office:value-type="string" calcext:value-type="string">
            <text:p>One-Handed Sword: Short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WH</text:p>
          </table:table-cell>
          <table:table-cell table:style-name="ce51" office:value-type="string" calcext:value-type="string">
            <text:p>War Hammer</text:p>
          </table:table-cell>
          <table:table-cell table:style-name="ce56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>
            <text:p>ZW</text:p>
          </table:table-cell>
          <table:table-cell table:style-name="ce50" office:value-type="string" calcext:value-type="string">
            <text:p>Wings (female)</text:p>
          </table:table-cell>
          <table:table-cell table:style-name="ce57" office:value-type="string" calcext:value-type="string">
            <text:p>Invisible</text:p>
          </table:table-cell>
          <table:table-cell table:number-columns-repeated="1021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kin Calhan</meta:initial-creator>
    <meta:creation-date>2015-06-05T18:19:34</meta:creation-date>
    <dc:date>2026-07-09T09:38:00.916000000</dc:date>
    <meta:generator>LibreOffice/7.3.5.2$Windows_X86_64 LibreOffice_project/184fe81b8c8c30d8b5082578aee2fed2ea847c01</meta:generator>
    <meta:editing-duration>PT14H12M33S</meta:editing-duration>
    <meta:editing-cycles>36</meta:editing-cycles>
    <meta:document-statistic meta:table-count="2" meta:cell-count="247" meta:object-count="31"/>
    <meta:user-defined meta:name="AppVersion">16.0300</meta:user-defined>
  </office:meta>
</office:document-meta>
</file>